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Heading_20_3">
      <style:paragraph-properties fo:margin-top="0cm" fo:margin-bottom="0.247cm" style:contextual-spacing="false" fo:line-height="115%"/>
    </style:style>
    <style:style style:name="P8" style:family="paragraph" style:parent-style-name="Horizontal_20_Line">
      <style:paragraph-properties fo:margin-top="0cm" fo:margin-bottom="0.247cm" style:contextual-spacing="false" fo:line-height="115%"/>
    </style:style>
    <style:style style:name="P9" style:family="paragraph" style:parent-style-name="Heading_20_2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6"/>
    <style:style style:name="P14" style:family="paragraph" style:parent-style-name="Text_20_body">
      <style:text-properties officeooo:paragraph-rsid="00186e05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Heading_20_2">
      <style:paragraph-properties fo:margin-top="0cm" fo:margin-bottom="0.247cm" style:contextual-spacing="false" fo:line-height="115%"/>
      <style:text-properties fo:font-size="24pt" officeooo:rsid="001b5234" officeooo:paragraph-rsid="001b5234" style:font-size-asian="24pt" style:font-size-complex="24pt"/>
    </style:style>
    <style:style style:name="P23" style:family="paragraph" style:parent-style-name="Text_20_body" style:list-style-name="L14"/>
    <style:style style:name="P24" style:family="paragraph" style:parent-style-name="Text_20_body">
      <style:paragraph-properties fo:margin-top="0cm" fo:margin-bottom="0.247cm" style:contextual-spacing="false" fo:line-height="115%"/>
    </style:style>
    <style:style style:name="P25" style:family="paragraph" style:parent-style-name="Heading_20_1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Standard">
      <style:text-properties officeooo:rsid="001a15d3" officeooo:paragraph-rsid="001a15d3"/>
    </style:style>
    <style:style style:name="P32" style:family="paragraph" style:parent-style-name="Heading_20_1">
      <style:text-properties officeooo:rsid="001a15d3" officeooo:paragraph-rsid="001a15d3"/>
    </style:style>
    <style:style style:name="P33" style:family="paragraph" style:parent-style-name="Text_20_body">
      <style:text-properties officeooo:rsid="001a15d3"/>
    </style:style>
    <style:style style:name="P34" style:family="paragraph" style:parent-style-name="Heading_20_3">
      <style:text-properties officeooo:rsid="001a15d3"/>
    </style:style>
    <style:style style:name="P35" style:family="paragraph" style:parent-style-name="Horizontal_20_Line">
      <style:text-properties officeooo:rsid="001a15d3"/>
    </style:style>
    <style:style style:name="P36" style:family="paragraph" style:parent-style-name="Heading_20_2">
      <style:text-properties officeooo:rsid="001a15d3"/>
    </style:style>
    <style:style style:name="P37" style:family="paragraph" style:parent-style-name="Text_20_body" style:list-style-name="L20">
      <style:text-properties officeooo:rsid="001a15d3"/>
    </style:style>
    <style:style style:name="P38" style:family="paragraph" style:parent-style-name="Text_20_body" style:list-style-name="L21">
      <style:text-properties officeooo:rsid="001a15d3"/>
    </style:style>
    <style:style style:name="P39" style:family="paragraph" style:parent-style-name="Heading_20_1">
      <style:text-properties officeooo:rsid="001a15d3"/>
    </style:style>
    <style:style style:name="P40" style:family="paragraph" style:parent-style-name="Text_20_body" style:list-style-name="L22">
      <style:text-properties officeooo:rsid="001a15d3"/>
    </style:style>
    <style:style style:name="P41" style:family="paragraph" style:parent-style-name="Text_20_body" style:list-style-name="L23">
      <style:text-properties officeooo:rsid="001a15d3"/>
    </style:style>
    <style:style style:name="P42" style:family="paragraph" style:parent-style-name="Text_20_body" style:list-style-name="L24">
      <style:text-properties officeooo:rsid="001a15d3"/>
    </style:style>
    <style:style style:name="P43" style:family="paragraph" style:parent-style-name="Text_20_body" style:list-style-name="L25">
      <style:text-properties officeooo:rsid="001a15d3"/>
    </style:style>
    <style:style style:name="P44" style:family="paragraph" style:parent-style-name="Text_20_body" style:list-style-name="L26">
      <style:text-properties officeooo:rsid="001a15d3"/>
    </style:style>
    <style:style style:name="P45" style:family="paragraph" style:parent-style-name="Text_20_body" style:list-style-name="L27">
      <style:text-properties officeooo:rsid="001a15d3"/>
    </style:style>
    <style:style style:name="P46" style:family="paragraph" style:parent-style-name="Text_20_body" style:list-style-name="L28">
      <style:text-properties officeooo:rsid="001a15d3"/>
    </style:style>
    <style:style style:name="P47" style:family="paragraph" style:parent-style-name="Text_20_body" style:list-style-name="L29">
      <style:text-properties officeooo:rsid="001a15d3"/>
    </style:style>
    <style:style style:name="P48" style:family="paragraph" style:parent-style-name="Heading_20_2">
      <style:text-properties fo:font-size="24pt" officeooo:rsid="001b5234" officeooo:paragraph-rsid="001b5234" style:font-size-asian="24pt" style:font-size-complex="24pt"/>
    </style:style>
    <style:style style:name="P49" style:family="paragraph" style:parent-style-name="Heading_20_3">
      <style:paragraph-properties fo:margin-top="0cm" fo:margin-bottom="0.247cm" style:contextual-spacing="false" fo:line-height="115%"/>
      <style:text-properties officeooo:rsid="001a15d3"/>
    </style:style>
    <style:style style:name="P50" style:family="paragraph" style:parent-style-name="Text_20_body" style:list-style-name="L30">
      <style:paragraph-properties fo:margin-top="0cm" fo:margin-bottom="0cm" style:contextual-spacing="false"/>
      <style:text-properties officeooo:rsid="001a15d3"/>
    </style:style>
    <style:style style:name="P51" style:family="paragraph" style:parent-style-name="Text_20_body" style:list-style-name="L30">
      <style:text-properties officeooo:rsid="001a15d3"/>
    </style:style>
    <style:style style:name="P52" style:family="paragraph" style:parent-style-name="Heading_20_1">
      <style:text-properties fo:font-size="18pt" officeooo:rsid="001a15d3" style:font-size-asian="18pt" style:font-size-complex="18pt"/>
    </style:style>
    <style:style style:name="P53" style:family="paragraph" style:parent-style-name="Text_20_body" style:list-style-name="L31">
      <style:text-properties officeooo:rsid="001a15d3"/>
    </style:style>
    <style:style style:name="P54" style:family="paragraph" style:parent-style-name="Text_20_body" style:list-style-name="L32">
      <style:text-properties officeooo:rsid="001a15d3"/>
    </style:style>
    <style:style style:name="P55" style:family="paragraph" style:parent-style-name="Text_20_body" style:list-style-name="L33">
      <style:text-properties officeooo:rsid="001a15d3"/>
    </style:style>
    <style:style style:name="P56" style:family="paragraph" style:parent-style-name="Text_20_body" style:list-style-name="L34">
      <style:text-properties officeooo:rsid="001a15d3"/>
    </style:style>
    <style:style style:name="P57" style:family="paragraph" style:parent-style-name="Text_20_body" style:list-style-name="L35">
      <style:text-properties officeooo:rsid="001a15d3"/>
    </style:style>
    <style:style style:name="P58" style:family="paragraph" style:parent-style-name="Text_20_body">
      <style:text-properties fo:color="#1f1f1f" loext:opacity="100%" style:font-name="Google Sans Text" officeooo:rsid="001a15d3" officeooo:paragraph-rsid="001a15d3"/>
    </style:style>
    <style:style style:name="P59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0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 officeooo:rsid="001a15d3"/>
    </style:style>
    <style:style style:name="P61" style:family="paragraph" style:parent-style-name="Text_20_body" style:list-style-name="L3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3" style:family="paragraph" style:parent-style-name="Text_20_body" style:list-style-name="L3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4" style:family="paragraph" style:parent-style-name="Text_20_body" style:list-style-name="L3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rsid="001a15d3"/>
    </style:style>
    <style:style style:name="P65" style:family="paragraph" style:parent-style-name="Text_20_body" style:list-style-name="L38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6" style:family="paragraph" style:parent-style-name="Text_20_body" style:list-style-name="L3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rsid="001a15d3"/>
    </style:style>
    <style:style style:name="P6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rsid="001a15d3"/>
    </style:style>
    <style:style style:name="P68" style:family="paragraph" style:parent-style-name="Text_20_body" style:list-style-name="L3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rsid="001a15d3"/>
    </style:style>
    <style:style style:name="P69" style:family="paragraph" style:parent-style-name="Standard">
      <style:text-properties officeooo:rsid="001d7fa5" officeooo:paragraph-rsid="001d7fa5"/>
    </style:style>
    <style:style style:name="P70" style:family="paragraph" style:parent-style-name="Heading_20_2">
      <style:text-properties style:font-name="Google Sans" officeooo:rsid="001d7fa5" officeooo:paragraph-rsid="001d7fa5"/>
    </style:style>
    <style:style style:name="P7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officeooo:rsid="001d7fa5"/>
    </style:style>
    <style:style style:name="P72" style:family="paragraph" style:parent-style-name="Text_20_body" style:list-style-name="L4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rsid="001d7fa5"/>
    </style:style>
    <style:style style:name="P7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1d7fa5"/>
    </style:style>
    <style:style style:name="P7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1d7fa5"/>
    </style:style>
    <style:style style:name="P75" style:family="paragraph" style:parent-style-name="Text_20_body" style:list-style-name="L4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d7fa5"/>
    </style:style>
    <style:style style:name="P7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1d7fa5"/>
    </style:style>
    <style:style style:name="P77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  <style:text-properties style:font-name="Google Sans Text" fo:font-weight="bold" officeooo:rsid="001d7fa5"/>
    </style:style>
    <style:style style:name="P78" style:family="paragraph" style:parent-style-name="Quotations" style:list-style-name="L42">
      <style:paragraph-properties fo:margin-left="1cm" fo:margin-right="1cm" fo:margin-top="0cm" fo:margin-bottom="0.499cm" style:contextual-spacing="false" fo:line-height="114%" fo:text-indent="0cm" style:auto-text-indent="false" fo:padding="0cm" fo:border="none"/>
      <style:text-properties style:font-name="Google Sans Text" officeooo:rsid="001d7fa5"/>
    </style:style>
    <style:style style:name="P79" style:family="paragraph" style:parent-style-name="Quotations" style:list-style-name="L42">
      <style:paragraph-properties fo:margin-left="1cm" fo:margin-right="1cm" fo:margin-top="0cm" fo:margin-bottom="0.499cm" style:contextual-spacing="false" fo:line-height="114%" fo:text-indent="0cm" style:auto-text-indent="false" fo:padding="0cm" fo:border="none"/>
      <style:text-properties officeooo:rsid="001d7fa5"/>
    </style:style>
    <style:style style:name="P80" style:family="paragraph" style:parent-style-name="Heading_20_3">
      <style:text-properties style:font-name="Google Sans" officeooo:rsid="001d7fa5" officeooo:paragraph-rsid="001d7fa5"/>
    </style:style>
    <style:style style:name="P81" style:family="paragraph" style:parent-style-name="Text_20_body" style:list-style-name="L4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d7fa5"/>
    </style:style>
    <style:style style:name="P82" style:family="paragraph" style:parent-style-name="Text_20_body" style:list-style-name="L4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rsid="001d7fa5"/>
    </style:style>
    <style:style style:name="P83" style:family="paragraph" style:parent-style-name="Text_20_body" style:list-style-name="L4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rsid="001d7fa5"/>
    </style:style>
    <style:style style:name="P84" style:family="paragraph" style:parent-style-name="Text_20_body" style:list-style-name="L4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d7fa5"/>
    </style:style>
    <style:style style:name="T1" style:family="text">
      <style:text-properties officeooo:rsid="00186e05"/>
    </style:style>
    <style:style style:name="T2" style:family="text">
      <style:text-properties officeooo:rsid="001a15d3"/>
    </style:style>
    <style:style style:name="T3" style:family="text">
      <style:text-properties fo:font-weight="bold" loext:padding="0cm" loext:border="none"/>
    </style:style>
    <style:style style:name="T4" style:family="text">
      <style:text-properties fo:color="#1f1f1f" loext:opacity="100%" style:font-name="Google Sans Text" fo:font-weight="bold" loext:padding="0cm" loext:border="none"/>
    </style:style>
    <style:style style:name="T5" style:family="text">
      <style:text-properties fo:color="#1f1f1f" loext:opacity="100%" style:font-name="Google Sans Text"/>
    </style:style>
    <style:style style:name="T6" style:family="text">
      <style:text-properties fo:color="#444746" loext:opacity="100%" style:font-name="Google Sans Text" loext:padding="0cm" loext:border="none"/>
    </style:style>
    <style:style style:name="T7" style:family="text">
      <style:text-properties style:font-name="Google Sans Text"/>
    </style:style>
    <style:style style:name="T8" style:family="text">
      <style:text-properties style:font-name="Google Sans Text" fo:font-weight="bold"/>
    </style:style>
    <style:style style:name="T9" style:family="text">
      <style:text-properties fo:font-weight="bold"/>
    </style:style>
    <style:style style:name="T10" style:family="text">
      <style:text-properties fo:font-style="italic"/>
    </style:style>
    <style:style style:name="T11" style:family="text">
      <style:text-properties style:font-name="Google Sans Text" fo:font-style="itali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to-One-Videochat-App</text:h>
      <text:p text:style-name="Standard"/>
      <text:p text:style-name="Standard"/>
      <text:h text:style-name="Heading_20_1" text:outline-level="1">Anleitung zur Nutzung der One-to-One-Videochat-App</text:h>
      <text:h text:style-name="Heading_20_2" text:outline-level="2">1. App öffnen</text:h>
      <text:list text:style-name="L1">
        <text:list-item>
          <text:p text:style-name="P1">Öffne die Videochat-App im Browser. </text:p>
        </text:list-item>
        <text:list-item>
          <text:p text:style-name="P2">Erlaube den Zugriff auf Kamera und Mikrofon. </text:p>
        </text:list-item>
      </text:list>
      <text:h text:style-name="Heading_20_2" text:outline-level="2">2. Raum erstellen oder beitreten</text:h>
      <text:list text:style-name="L2">
        <text:list-item>
          <text:p text:style-name="P3">Gib deinen Namen ein. </text:p>
        </text:list-item>
        <text:list-item>
          <text:p text:style-name="P3">Erstelle einen neuen Raum oder nutze einen vorhandenen Einladungslink. </text:p>
        </text:list-item>
        <text:list-item>
          <text:p text:style-name="P4">Teile den Link mit der anderen Person. </text:p>
        </text:list-item>
      </text:list>
      <text:h text:style-name="Heading_20_2" text:outline-level="2">3. Videoanruf starten</text:h>
      <text:list text:style-name="L3">
        <text:list-item>
          <text:p text:style-name="P5">Sobald beide Teilnehmer im Raum sind, startet die Verbindung automatisch. </text:p>
        </text:list-item>
        <text:list-item>
          <text:p text:style-name="P6">Prüfe, ob Kamera und Mikrofon aktiviert sind. </text:p>
        </text:list-item>
      </text:list>
      <text:h text:style-name="Heading_20_2" text:outline-level="2">4. Während des Gesprächs</text:h>
      <text:h text:style-name="Heading_20_2" text:outline-level="2">Einladungsmail</text:h>
      <text:p text:style-name="Text_20_body">Betreff: Einladung zum privaten Videochat</text:p>
      <text:p text:style-name="Text_20_body">Hallo,</text:p>
      <text:p text:style-name="Text_20_body">du bist zu einem privaten One-to-One-Videochat eingeladen.</text:p>
      <text:h text:style-name="P7" text:outline-level="3">Zugangsdaten</text:h>
      <text:p text:style-name="Text_20_body"><text:span text:style-name="Strong_20_Emphasis">Login-Seite:</text:span><text:line-break/><text:a xlink:type="simple" xlink:href="https://svenmagnus.github.io/website_02/?utm_source=chatgpt.com" text:style-name="Internet_20_link" text:visited-style-name="Visited_20_Internet_20_Link">Videochat Login</text:a></text:p>
      <text:p text:style-name="Text_20_body"><text:span text:style-name="Strong_20_Emphasis">Passwort:</text:span><text:line-break/><text:span text:style-name="Source_20_Text">[PASSWORT: </text:span><text:span text:style-name="Source_20_Text"><text:span text:style-name="T1">Velvet_Touch</text:span></text:span><text:span text:style-name="Source_20_Text">]</text:span></text:p>
      <text:p text:style-name="Text_20_body"><text:span text:style-name="Strong_20_Emphasis">Peer-ID des Hosts:</text:span><text:line-break/><text:span text:style-name="Source_20_Text">[PEER-ID HIER EINTRAGEN]</text:span></text:p>
      <text:p text:style-name="P8"/>
      <text:h text:style-name="P9" text:outline-level="2"><text:soft-page-break/>So verbindest du dich</text:h>
      <text:list text:style-name="L4">
        <text:list-item>
          <text:p text:style-name="P10">Öffne den Link zur Videochat-Seite.</text:p>
        </text:list-item>
        <text:list-item>
          <text:p text:style-name="P10">Erlaube Kamera- und Mikrofonzugriff im Browser.</text:p>
        </text:list-item>
        <text:list-item>
          <text:p text:style-name="P10">Gib das Passwort ein.</text:p>
        </text:list-item>
        <text:list-item>
          <text:p text:style-name="P10">Klicke auf:<text:line-break/><text:span text:style-name="Strong_20_Emphasis">„Mit Host verbinden“</text:span></text:p>
        </text:list-item>
        <text:list-item>
          <text:p text:style-name="P10">Füge die Peer-ID des Hosts in das Feld:<text:line-break/><text:span text:style-name="Strong_20_Emphasis">„ID vom Host einfügen …“</text:span><text:line-break/>ein.</text:p>
        </text:list-item>
        <text:list-item>
          <text:p text:style-name="P10">Nach wenigen Sekunden sollte die Verbindung aktiv sein.</text:p>
        </text:list-item>
      </text:list>
      <text:p text:style-name="P8"/>
      <text:h text:style-name="P9" text:outline-level="2">Hinweise</text:h>
      <text:list text:style-name="L5">
        <text:list-item>
          <text:p text:style-name="P11">Funktioniert am besten mit:</text:p>
          <text:list>
            <text:list-item>
              <text:p text:style-name="P11"><text:a xlink:type="simple" xlink:href="https://www.google.com/chrome/?utm_source=chatgpt.com" text:style-name="Internet_20_link" text:visited-style-name="Visited_20_Internet_20_Link">Google Chrome</text:a></text:p>
            </text:list-item>
            <text:list-item>
              <text:p text:style-name="P11"><text:a xlink:type="simple" xlink:href="https://www.microsoft.com/edge?utm_source=chatgpt.com" text:style-name="Internet_20_link" text:visited-style-name="Visited_20_Internet_20_Link">Microsoft Edge</text:a></text:p>
            </text:list-item>
          </text:list>
        </text:list-item>
        <text:list-item>
          <text:p text:style-name="P11">Bitte stabile Internetverbindung verwenden.</text:p>
        </text:list-item>
        <text:list-item>
          <text:p text:style-name="P11">Kamera und Mikrofon müssen im Browser erlaubt sein.</text:p>
        </text:list-item>
      </text:list>
      <text:p text:style-name="Text_20_body">Viele Grüße</text:p>
      <text:h text:style-name="P12" text:outline-level="1">Benutzerhandbuch – One-to-One-Videochat-App</text:h>
      <text:h text:style-name="P9" text:outline-level="2">1. Zweck der Anwendung</text:h>
      <text:p text:style-name="Text_20_body">Die Anwendung ermöglicht einen direkten privaten Videochat zwischen zwei Personen über eine Peer-to-Peer-Verbindung.</text:p>
      <text:p text:style-name="Text_20_body">Es gibt:</text:p>
      <text:list text:style-name="L6">
        <text:list-item>
          <text:p text:style-name="P13">einen <text:span text:style-name="Strong_20_Emphasis">Host</text:span></text:p>
        </text:list-item>
        <text:list-item>
          <text:p text:style-name="P13">einen <text:span text:style-name="Strong_20_Emphasis">Gast / Teilnehmer</text:span></text:p>
        </text:list-item>
      </text:list>
      <text:p text:style-name="P14">Der Host erstellt die Verbindung. <text:line-break/>Der Teilnehmer verbindet sich über die Peer-ID des Hosts.</text:p>
      <text:p text:style-name="P8"/>
      <text:h text:style-name="P12" text:outline-level="1">2. Voraussetzungen</text:h>
      <text:p text:style-name="Text_20_body">Empfohlene Browser:</text:p>
      <text:list text:style-name="L7">
        <text:list-item>
          <text:p text:style-name="P15"><text:a xlink:type="simple" xlink:href="https://www.google.com/chrome/?utm_source=chatgpt.com" text:style-name="Internet_20_link" text:visited-style-name="Visited_20_Internet_20_Link"><text:soft-page-break/>Google Chrome</text:a></text:p>
        </text:list-item>
        <text:list-item>
          <text:p text:style-name="P15"><text:a xlink:type="simple" xlink:href="https://www.microsoft.com/edge?utm_source=chatgpt.com" text:style-name="Internet_20_link" text:visited-style-name="Visited_20_Internet_20_Link">Microsoft Edge</text:a></text:p>
        </text:list-item>
      </text:list>
      <text:p text:style-name="Text_20_body">Erforderlich:</text:p>
      <text:list text:style-name="L8">
        <text:list-item>
          <text:p text:style-name="P16">Kamera</text:p>
        </text:list-item>
        <text:list-item>
          <text:p text:style-name="P16">Mikrofon</text:p>
        </text:list-item>
        <text:list-item>
          <text:p text:style-name="P16">stabile Internetverbindung</text:p>
        </text:list-item>
      </text:list>
      <text:p text:style-name="P8"/>
      <text:h text:style-name="P12" text:outline-level="1">3. Oberfläche der App</text:h>
      <text:p text:style-name="Text_20_body">Die Oberfläche besteht aus mehreren Bereichen:</text:p>
      <text:h text:style-name="P9" text:outline-level="2">Lokales Kamerabild („DU“)</text:h>
      <text:p text:style-name="Text_20_body">Zeigt das eigene Kamerabild.</text:p>
      <text:h text:style-name="P9" text:outline-level="2">Gegenüber („REMOTE“)</text:h>
      <text:p text:style-name="Text_20_body">Zeigt den verbundenen Gesprächspartner.</text:p>
      <text:h text:style-name="P9" text:outline-level="2">Verbindungsbereich</text:h>
      <text:p text:style-name="Text_20_body">Hier wird die Verbindung aufgebaut:</text:p>
      <text:list text:style-name="L9">
        <text:list-item>
          <text:p text:style-name="P17">Als Host starten</text:p>
        </text:list-item>
        <text:list-item>
          <text:p text:style-name="P17">Mit Host verbinden</text:p>
        </text:list-item>
        <text:list-item>
          <text:p text:style-name="P17">Trennen</text:p>
        </text:list-item>
      </text:list>
      <text:h text:style-name="P9" text:outline-level="2">Peer-ID</text:h>
      <text:p text:style-name="Text_20_body">Jeder Host erhält automatisch eine eindeutige Peer-ID.</text:p>
      <text:p text:style-name="Text_20_body">Diese muss an den Gesprächspartner weitergegeben werden.</text:p>
      <text:p text:style-name="P8"/>
      <text:h text:style-name="P12" text:outline-level="1">4. Verbindung als Host herstellen</text:h>
      <text:h text:style-name="P9" text:outline-level="2">Schritt-für-Schritt</text:h>
      <text:list text:style-name="L10">
        <text:list-item>
          <text:p text:style-name="P18">Öffne die App:<text:line-break/><text:a xlink:type="simple" xlink:href="https://svenmagnus.github.io/website_02/?utm_source=chatgpt.com" text:style-name="Internet_20_link" text:visited-style-name="Visited_20_Internet_20_Link">Videochat App</text:a></text:p>
        </text:list-item>
        <text:list-item>
          <text:p text:style-name="P18">Kamera- und Mikrofonzugriff erlauben.</text:p>
        </text:list-item>
        <text:list-item>
          <text:p text:style-name="P18">Klicke auf:<text:line-break/><text:span text:style-name="Strong_20_Emphasis">„Als Host starten“</text:span></text:p>
        </text:list-item>
        <text:list-item>
          <text:p text:style-name="P18"><text:soft-page-break/>Unten erscheint:<text:line-break/><text:span text:style-name="Strong_20_Emphasis">„Deine aktuelle Peer-ID“</text:span></text:p>
        </text:list-item>
        <text:list-item>
          <text:p text:style-name="P18">Sende diese Peer-ID an den Teilnehmer.</text:p>
        </text:list-item>
        <text:list-item>
          <text:p text:style-name="P18">Warte auf die eingehende Verbindung.</text:p>
        </text:list-item>
      </text:list>
      <text:p text:style-name="P8"/>
      <text:h text:style-name="P12" text:outline-level="1">5. Verbindung als Teilnehmer herstellen</text:h>
      <text:list text:style-name="L11">
        <text:list-item>
          <text:p text:style-name="P19">Öffne den Einladungslink.</text:p>
        </text:list-item>
        <text:list-item>
          <text:p text:style-name="P19">Kamera- und Mikrofonzugriff erlauben.</text:p>
        </text:list-item>
        <text:list-item>
          <text:p text:style-name="P19">Klicke:<text:line-break/><text:span text:style-name="Strong_20_Emphasis">„Mit Host verbinden“</text:span></text:p>
        </text:list-item>
        <text:list-item>
          <text:p text:style-name="P19">Füge die Peer-ID des Hosts in das Eingabefeld ein.</text:p>
        </text:list-item>
        <text:list-item>
          <text:p text:style-name="P19">Die Verbindung wird automatisch aufgebaut.</text:p>
        </text:list-item>
      </text:list>
      <text:p text:style-name="P8"/>
      <text:h text:style-name="P12" text:outline-level="1">6. Ansichtsmodi</text:h>
      <text:p text:style-name="Text_20_body">Die App unterstützt verschiedene Darstellungen:</text:p>
      <text:list text:style-name="L12">
        <text:list-item>
          <text:p text:style-name="P20">Nebeneinander</text:p>
        </text:list-item>
        <text:list-item>
          <text:p text:style-name="P20">PiP Gegenüber groß</text:p>
        </text:list-item>
        <text:list-item>
          <text:p text:style-name="P20">PiP Du groß</text:p>
        </text:list-item>
      </text:list>
      <text:p text:style-name="Text_20_body">Zusätzlich kann die Position des PiP-Fensters gewählt werden:</text:p>
      <text:list text:style-name="L13">
        <text:list-item>
          <text:p text:style-name="P21">unten rechts</text:p>
        </text:list-item>
        <text:list-item>
          <text:p text:style-name="P21">andere Positionen je nach Einstellung</text:p>
        </text:list-item>
      </text:list>
      <text:p text:style-name="P8"/>
      <text:h text:style-name="P22" text:outline-level="2">7. Lovense Toy Anbindung</text:h>
      <text:h text:style-name="P7" text:outline-level="3">Verbinde dein Lovense Toy</text:h>
      <text:p text:style-name="Text_20_body">Bevor die Session startet:</text:p>
      <text:list text:style-name="L14">
        <text:list-item>
          <text:p text:style-name="P23">Schalte dein Lovense-Gerät ein.</text:p>
        </text:list-item>
        <text:list-item>
          <text:p text:style-name="P23">Öffne die <text:a xlink:type="simple" xlink:href="https://www.lovense.com/connect?utm_source=chatgpt.com" text:style-name="Internet_20_link" text:visited-style-name="Visited_20_Internet_20_Link">Lovense Connect App</text:a> auf deinem Smartphone.</text:p>
        </text:list-item>
        <text:list-item>
          <text:p text:style-name="P23">Verbinde das Toy per Bluetooth mit der Lovense-App.</text:p>
        </text:list-item>
        <text:list-item>
          <text:p text:style-name="P23">Lass die Lovense Connect App während der gesamten Video-Session im Hintergrund geöffnet.</text:p>
        </text:list-item>
        <text:list-item>
          <text:p text:style-name="P23"><text:soft-page-break/>Sobald die Verbindung aktiv ist, können die Fernsteuerungs- und Impulsfunktionen in der Videochat-App genutzt werden.</text:p>
        </text:list-item>
      </text:list>
      <text:p text:style-name="P24"/>
      <text:h text:style-name="P12" text:outline-level="1"/>
      <text:h text:style-name="P25" text:outline-level="1">Fernsteuerung / Impulsfunktion</text:h>
      <text:p text:style-name="Text_20_body">Im rechten Bereich kann der Teilnehmer Signale an den Host senden.</text:p>
      <text:p text:style-name="Text_20_body">Möglichkeiten:</text:p>
      <text:list text:style-name="L15">
        <text:list-item>
          <text:p text:style-name="P26">Intensität einstellen</text:p>
        </text:list-item>
        <text:list-item>
          <text:p text:style-name="P26">verschiedene Stufen:</text:p>
          <text:list>
            <text:list-item>
              <text:p text:style-name="P26">Leicht</text:p>
            </text:list-item>
            <text:list-item>
              <text:p text:style-name="P26">Mittel</text:p>
            </text:list-item>
            <text:list-item>
              <text:p text:style-name="P26">Stark</text:p>
            </text:list-item>
            <text:list-item>
              <text:p text:style-name="P26">Max</text:p>
            </text:list-item>
          </text:list>
        </text:list-item>
        <text:list-item>
          <text:p text:style-name="P26">Impuls senden</text:p>
        </text:list-item>
      </text:list>
      <text:p text:style-name="P8"/>
      <text:h text:style-name="P12" text:outline-level="1">8. Verbindung trennen</text:h>
      <text:p text:style-name="Text_20_body">Zum Beenden:</text:p>
      <text:list text:style-name="L16">
        <text:list-item>
          <text:p text:style-name="P27">auf <text:span text:style-name="Strong_20_Emphasis">„Trennen“</text:span> klicken</text:p>
        </text:list-item>
        <text:list-item>
          <text:p text:style-name="P27">Browserfenster schließen</text:p>
        </text:list-item>
      </text:list>
      <text:p text:style-name="P8"/>
      <text:h text:style-name="P12" text:outline-level="1">9. Fehlerbehebung</text:h>
      <text:h text:style-name="P9" text:outline-level="2">Keine Kamera sichtbar</text:h>
      <text:list text:style-name="L17">
        <text:list-item>
          <text:p text:style-name="P28">Browserberechtigung prüfen</text:p>
        </text:list-item>
        <text:list-item>
          <text:p text:style-name="P28">Seite neu laden</text:p>
        </text:list-item>
      </text:list>
      <text:h text:style-name="P9" text:outline-level="2">Kein Ton</text:h>
      <text:list text:style-name="L18">
        <text:list-item>
          <text:p text:style-name="P29">Mikrofon aktivieren</text:p>
        </text:list-item>
        <text:list-item>
          <text:p text:style-name="P29">Audioausgabe prüfen</text:p>
        </text:list-item>
      </text:list>
      <text:h text:style-name="P9" text:outline-level="2"><text:soft-page-break/>Verbindung klappt nicht</text:h>
      <text:list text:style-name="L19">
        <text:list-item>
          <text:p text:style-name="P30">richtige Peer-ID verwenden</text:p>
        </text:list-item>
        <text:list-item>
          <text:p text:style-name="P30">beide Teilnehmer online</text:p>
        </text:list-item>
        <text:list-item>
          <text:p text:style-name="P30">Firewall/VPN testweise deaktivieren</text:p>
        </text:list-item>
      </text:list>
      <text:p text:style-name="P8"/>
      <text:h text:style-name="P12" text:outline-level="1">10. Sicherheitshinweis</text:h>
      <text:p text:style-name="Text_20_body">Die Anwendung ist ausschließlich für private und einvernehmliche Nutzung vorgesehen.</text:p>
      <text:p text:style-name="Text_20_body"/>
      <text:p text:style-name="Standard"/>
      <text:p text:style-name="Standard"/>
      <text:p text:style-name="P31">English version:</text:p>
      <text:p text:style-name="P31"/>
      <text:h text:style-name="P32" text:outline-level="1">Invitation Email</text:h>
      <text:p text:style-name="P33"><text:span text:style-name="Strong_20_Emphasis">Subject:</text:span> Invitation to a Private Video Chat</text:p>
      <text:p text:style-name="P33">Hello,</text:p>
      <text:p text:style-name="P33">you are invited to a private one-to-one video chat session.</text:p>
      <text:h text:style-name="P34" text:outline-level="3">Access Information</text:h>
      <text:p text:style-name="P33"><text:span text:style-name="Strong_20_Emphasis">Login Page:</text:span><text:line-break/><text:a xlink:type="simple" xlink:href="https://svenmagnus.github.io/website_02/?utm_source=chatgpt.com" text:style-name="Internet_20_link" text:visited-style-name="Visited_20_Internet_20_Link">Videochat Login</text:a></text:p>
      <text:p text:style-name="P33"><text:span text:style-name="Strong_20_Emphasis">Password:</text:span><text:line-break/><text:span text:style-name="Source_20_Text">[INSERT PASSWORD HERE]</text:span></text:p>
      <text:p text:style-name="P33"><text:span text:style-name="Strong_20_Emphasis">Host Peer ID:</text:span><text:line-break/><text:span text:style-name="Source_20_Text">[INSERT PEER-ID HERE]</text:span></text:p>
      <text:p text:style-name="P35"/>
      <text:h text:style-name="P36" text:outline-level="2">How to Connect</text:h>
      <text:list text:style-name="L20">
        <text:list-item>
          <text:p text:style-name="P37">Open the video chat link.</text:p>
        </text:list-item>
        <text:list-item>
          <text:p text:style-name="P37">Allow camera and microphone access in your browser.</text:p>
        </text:list-item>
        <text:list-item>
          <text:p text:style-name="P37">Enter the password.</text:p>
        </text:list-item>
        <text:list-item>
          <text:p text:style-name="P37">Click:<text:line-break/><text:span text:style-name="Strong_20_Emphasis">“Connect to Host”</text:span></text:p>
        </text:list-item>
        <text:list-item>
          <text:p text:style-name="P37">Paste the host’s Peer ID into the field:<text:line-break/><text:span text:style-name="Strong_20_Emphasis">“Insert Host ID …”</text:span></text:p>
        </text:list-item>
        <text:list-item>
          <text:p text:style-name="P37"><text:soft-page-break/>The connection should be established within a few seconds.</text:p>
        </text:list-item>
      </text:list>
      <text:p text:style-name="P35"/>
      <text:h text:style-name="P36" text:outline-level="2">Notes</text:h>
      <text:list text:style-name="L21">
        <text:list-item>
          <text:p text:style-name="P38">Best used with:</text:p>
          <text:list>
            <text:list-item>
              <text:p text:style-name="P38"><text:a xlink:type="simple" xlink:href="https://www.google.com/chrome/?utm_source=chatgpt.com" text:style-name="Internet_20_link" text:visited-style-name="Visited_20_Internet_20_Link">Google Chrome</text:a></text:p>
            </text:list-item>
            <text:list-item>
              <text:p text:style-name="P38"><text:a xlink:type="simple" xlink:href="https://www.microsoft.com/edge?utm_source=chatgpt.com" text:style-name="Internet_20_link" text:visited-style-name="Visited_20_Internet_20_Link">Microsoft Edge</text:a></text:p>
            </text:list-item>
          </text:list>
        </text:list-item>
        <text:list-item>
          <text:p text:style-name="P38">Please use a stable internet connection.</text:p>
        </text:list-item>
        <text:list-item>
          <text:p text:style-name="P38">Camera and microphone permissions must be enabled.</text:p>
        </text:list-item>
      </text:list>
      <text:p text:style-name="P33">Best regards</text:p>
      <text:h text:style-name="P39" text:outline-level="1">User Manual – One-to-One Video Chat App</text:h>
      <text:h text:style-name="P36" text:outline-level="2">1. Purpose of the Application</text:h>
      <text:p text:style-name="P33">This application allows a direct private peer-to-peer video chat between two people.</text:p>
      <text:p text:style-name="P33">There are two roles:</text:p>
      <text:list text:style-name="L22">
        <text:list-item>
          <text:p text:style-name="P40"><text:span text:style-name="Strong_20_Emphasis">Host</text:span></text:p>
        </text:list-item>
        <text:list-item>
          <text:p text:style-name="P40"><text:span text:style-name="Strong_20_Emphasis">Guest / Participant</text:span></text:p>
        </text:list-item>
      </text:list>
      <text:p text:style-name="P33">The host creates the session.<text:line-break/>The participant connects using the host’s Peer ID.</text:p>
      <text:p text:style-name="P35"/>
      <text:h text:style-name="P39" text:outline-level="1">2. Requirements</text:h>
      <text:p text:style-name="P33">Recommended browsers:</text:p>
      <text:list text:style-name="L23">
        <text:list-item>
          <text:p text:style-name="P41"><text:a xlink:type="simple" xlink:href="https://www.google.com/chrome/?utm_source=chatgpt.com" text:style-name="Internet_20_link" text:visited-style-name="Visited_20_Internet_20_Link">Google Chrome</text:a></text:p>
        </text:list-item>
        <text:list-item>
          <text:p text:style-name="P41"><text:a xlink:type="simple" xlink:href="https://www.microsoft.com/edge?utm_source=chatgpt.com" text:style-name="Internet_20_link" text:visited-style-name="Visited_20_Internet_20_Link">Microsoft Edge</text:a></text:p>
        </text:list-item>
      </text:list>
      <text:p text:style-name="P33">Required:</text:p>
      <text:list text:style-name="L24">
        <text:list-item>
          <text:p text:style-name="P42">Camera</text:p>
        </text:list-item>
        <text:list-item>
          <text:p text:style-name="P42">Microphone</text:p>
        </text:list-item>
        <text:list-item>
          <text:p text:style-name="P42">Stable internet connection</text:p>
        </text:list-item>
      </text:list>
      <text:p text:style-name="P35"/>
      <text:h text:style-name="P39" text:outline-level="1"><text:soft-page-break/>3. App Interface</text:h>
      <text:p text:style-name="P33">The interface contains several sections:</text:p>
      <text:h text:style-name="P36" text:outline-level="2">Local Camera View (“YOU”)</text:h>
      <text:p text:style-name="P33">Displays your own camera feed.</text:p>
      <text:h text:style-name="P36" text:outline-level="2">Remote View (“REMOTE”)</text:h>
      <text:p text:style-name="P33">Displays the connected participant.</text:p>
      <text:h text:style-name="P36" text:outline-level="2">Connection Area</text:h>
      <text:p text:style-name="P33">This section is used to establish the connection:</text:p>
      <text:list text:style-name="L25">
        <text:list-item>
          <text:p text:style-name="P43">Start as Host</text:p>
        </text:list-item>
        <text:list-item>
          <text:p text:style-name="P43">Connect to Host</text:p>
        </text:list-item>
        <text:list-item>
          <text:p text:style-name="P43">Disconnect</text:p>
        </text:list-item>
      </text:list>
      <text:h text:style-name="P36" text:outline-level="2">Peer ID</text:h>
      <text:p text:style-name="P33">Each host automatically receives a unique Peer ID.</text:p>
      <text:p text:style-name="P33">This ID must be shared with the participant.</text:p>
      <text:p text:style-name="P35"/>
      <text:h text:style-name="P39" text:outline-level="1">4. Starting a Session as Host</text:h>
      <text:h text:style-name="P36" text:outline-level="2">Step-by-Step</text:h>
      <text:list text:style-name="L26">
        <text:list-item>
          <text:p text:style-name="P44">Open the app:<text:line-break/><text:a xlink:type="simple" xlink:href="https://svenmagnus.github.io/website_02/?utm_source=chatgpt.com" text:style-name="Internet_20_link" text:visited-style-name="Visited_20_Internet_20_Link">Videochat App</text:a></text:p>
        </text:list-item>
        <text:list-item>
          <text:p text:style-name="P44">Allow camera and microphone access.</text:p>
        </text:list-item>
        <text:list-item>
          <text:p text:style-name="P44">Click:<text:line-break/><text:span text:style-name="Strong_20_Emphasis">“Start as Host”</text:span></text:p>
        </text:list-item>
        <text:list-item>
          <text:p text:style-name="P44">Your current Peer ID will appear at the bottom.</text:p>
        </text:list-item>
        <text:list-item>
          <text:p text:style-name="P44">Send this Peer ID to the participant.</text:p>
        </text:list-item>
        <text:list-item>
          <text:p text:style-name="P44">Wait for the incoming connection.</text:p>
        </text:list-item>
      </text:list>
      <text:p text:style-name="P35"/>
      <text:h text:style-name="P39" text:outline-level="1"><text:soft-page-break/>5. Joining as Participant</text:h>
      <text:list text:style-name="L27">
        <text:list-item>
          <text:p text:style-name="P45">Open the invitation link.</text:p>
        </text:list-item>
        <text:list-item>
          <text:p text:style-name="P45">Allow camera and microphone access.</text:p>
        </text:list-item>
        <text:list-item>
          <text:p text:style-name="P45">Click:<text:line-break/><text:span text:style-name="Strong_20_Emphasis">“Connect to Host”</text:span></text:p>
        </text:list-item>
        <text:list-item>
          <text:p text:style-name="P45">Paste the host’s Peer ID into the input field.</text:p>
        </text:list-item>
        <text:list-item>
          <text:p text:style-name="P45">The connection will be established automatically.</text:p>
        </text:list-item>
      </text:list>
      <text:p text:style-name="P35"/>
      <text:h text:style-name="P39" text:outline-level="1">6. View Modes</text:h>
      <text:p text:style-name="P33">The app supports different layouts:</text:p>
      <text:list text:style-name="L28">
        <text:list-item>
          <text:p text:style-name="P46">Side-by-side</text:p>
        </text:list-item>
        <text:list-item>
          <text:p text:style-name="P46">PiP Remote Large</text:p>
        </text:list-item>
        <text:list-item>
          <text:p text:style-name="P46">PiP You Large</text:p>
        </text:list-item>
      </text:list>
      <text:p text:style-name="P33">You can also choose the Picture-in-Picture position:</text:p>
      <text:list text:style-name="L29">
        <text:list-item>
          <text:p text:style-name="P47">Bottom right</text:p>
        </text:list-item>
        <text:list-item>
          <text:p text:style-name="P47">Other positions depending on settings</text:p>
        </text:list-item>
      </text:list>
      <text:p text:style-name="P35"/>
      <text:h text:style-name="P48" text:outline-level="2"><text:span text:style-name="T2">7. </text:span>Lovense toy integration </text:h>
      <text:h text:style-name="P49" text:outline-level="3">Connect Your Lovense Toy</text:h>
      <text:p text:style-name="P33">Before starting the session:</text:p>
      <text:list text:style-name="L30">
        <text:list-item>
          <text:p text:style-name="P50">Turn on your Lovense device. </text:p>
        </text:list-item>
        <text:list-item>
          <text:p text:style-name="P50">Open the Lovense Connect App on your smartphone. </text:p>
        </text:list-item>
        <text:list-item>
          <text:p text:style-name="P50">Make sure the toy is connected to the Lovense app via Bluetooth. </text:p>
        </text:list-item>
        <text:list-item>
          <text:p text:style-name="P50">Keep the Lovense Connect app running in the background during the video session. </text:p>
        </text:list-item>
        <text:list-item>
          <text:p text:style-name="P51">Once connected, the remote control / impulse features in the video chat app can be used.</text:p>
        </text:list-item>
      </text:list>
      <text:h text:style-name="P52" text:outline-level="1">Remote Control / Impulse Function</text:h>
      <text:p text:style-name="P33">On the right side, participants can send signals to the host.</text:p>
      <text:p text:style-name="P33">Available options:</text:p>
      <text:list text:style-name="L31">
        <text:list-item>
          <text:p text:style-name="P53">Adjust intensity</text:p>
        </text:list-item>
        <text:list-item>
          <text:p text:style-name="P53">Different levels:</text:p>
          <text:list>
            <text:list-item>
              <text:p text:style-name="P53"><text:soft-page-break/>Light</text:p>
            </text:list-item>
            <text:list-item>
              <text:p text:style-name="P53">Medium</text:p>
            </text:list-item>
            <text:list-item>
              <text:p text:style-name="P53">Strong</text:p>
            </text:list-item>
            <text:list-item>
              <text:p text:style-name="P53">Max</text:p>
            </text:list-item>
          </text:list>
        </text:list-item>
        <text:list-item>
          <text:p text:style-name="P53">Send impulse</text:p>
        </text:list-item>
      </text:list>
      <text:p text:style-name="P35"/>
      <text:h text:style-name="P39" text:outline-level="1">8. Ending the Session</text:h>
      <text:p text:style-name="P33">To end the session:</text:p>
      <text:list text:style-name="L32">
        <text:list-item>
          <text:p text:style-name="P54">Click <text:span text:style-name="Strong_20_Emphasis">“Disconnect”</text:span></text:p>
        </text:list-item>
        <text:list-item>
          <text:p text:style-name="P54">Or close the browser window</text:p>
        </text:list-item>
      </text:list>
      <text:p text:style-name="P35"/>
      <text:h text:style-name="P39" text:outline-level="1">9. Troubleshooting</text:h>
      <text:h text:style-name="P36" text:outline-level="2">Camera not visible</text:h>
      <text:list text:style-name="L33">
        <text:list-item>
          <text:p text:style-name="P55">Check browser permissions</text:p>
        </text:list-item>
        <text:list-item>
          <text:p text:style-name="P55">Reload the page</text:p>
        </text:list-item>
      </text:list>
      <text:h text:style-name="P36" text:outline-level="2">No audio</text:h>
      <text:list text:style-name="L34">
        <text:list-item>
          <text:p text:style-name="P56">Enable microphone access</text:p>
        </text:list-item>
        <text:list-item>
          <text:p text:style-name="P56">Check audio output settings</text:p>
        </text:list-item>
      </text:list>
      <text:h text:style-name="P36" text:outline-level="2">Connection fails</text:h>
      <text:list text:style-name="L35">
        <text:list-item>
          <text:p text:style-name="P57">Verify the correct Peer ID</text:p>
        </text:list-item>
        <text:list-item>
          <text:p text:style-name="P57">Ensure both users are online</text:p>
        </text:list-item>
        <text:list-item>
          <text:p text:style-name="P57">Temporarily disable VPN or firewall if needed</text:p>
        </text:list-item>
      </text:list>
      <text:p text:style-name="P35"/>
      <text:h text:style-name="P39" text:outline-level="1">10. Safety Notice</text:h>
      <text:p text:style-name="P33">This application is intended exclusively for private and consensual use.</text:p>
      <text:p text:style-name="P31"/>
      <text:p text:style-name="P31"/>
      <text:p text:style-name="P31"><text:soft-page-break/></text:p>
      <text:p text:style-name="P31">--------</text:p>
      <text:p text:style-name="P31"/>
      <text:p text:style-name="P31"/>
      <text:p text:style-name="P31"/>
      <text:p text:style-name="P58">Lovense bietet für den PC zwei verschiedene Wege an. Es ist also <text:span text:style-name="T3">nicht zwingend ein Handy erforderlich</text:span>, aber die Art und Weise, wie die Verbindung technisch hergestellt wird, unterscheidet sich je nach Zielsetzung.</text:p>
      <text:section text:style-name="Sect1" text:name="model-response-message-contentr_479e6f70dd95e505">
        <text:p text:style-name="P59">Hier sind die Möglichkeiten für deinen PC-Setup:</text:p>
        <text:h text:style-name="P60" text:outline-level="3">1. Lovense Connect (PC/Mac App) — Der "Brücken"-Modus</text:h>
        <text:p text:style-name="P59">Das ist die gängigste Methode für den Desktop.</text:p>
        <text:list text:style-name="L36">
          <text:list-item>
            <text:p text:style-name="P61"><text:span text:style-name="T3">Wie es funktioniert:</text:span> Du installierst die <text:span text:style-name="T3">Lovense Connect App</text:span> auf deinem Computer.</text:p>
          </text:list-item>
          <text:list-item>
            <text:p text:style-name="P61"><text:span text:style-name="T3">Hardware:</text:span> Du benötigst den <text:span text:style-name="T3">Lovense USB Bluetooth Adapter</text:span> (Dongle). Die herkömmliche Bluetooth-Funktion von Windows-Laptops ist oft zu instabil oder inkompatibel mit den Toys; der spezielle Dongle umgeht dieses Problem.</text:p>
          </text:list-item>
          <text:list-item>
            <text:p text:style-name="P61"><text:span text:style-name="T3">Vorteil:</text:span> Das Handy bleibt komplett außen vor. Die App auf dem PC fungiert als lokaler Server, der die Signale von Webseiten (wie deiner Dual-Peer-App) empfängt und an das Toy weiterleitet.</text:p>
          </text:list-item>
        </text:list>
        <text:h text:style-name="P60" text:outline-level="3">2. Browser-Direktverbindung (Web Bluetooth)</text:h>
        <text:p text:style-name="P62">Einige moderne Browser (vor allem Chrome und Edge auf Windows/Android) unterstützen <text:span text:style-name="T3">Web Bluetooth</text:span>.</text:p>
        <text:list text:style-name="L37">
          <text:list-item>
            <text:p text:style-name="P63"><text:span text:style-name="T3">Wie es funktioniert:</text:span> Eine Webseite kann direkt über den Browser nach Bluetooth-Geräten suchen.</text:p>
          </text:list-item>
          <text:list-item>
            <text:p text:style-name="P64"><text:span text:style-name="T4">Einschränkung:</text:span><text:span text:style-name="T5"> In deinem aktuellen Code nutzt du das </text:span><text:span text:style-name="Source_20_Text"><text:span text:style-name="T6">broadcast.js</text:span></text:span><text:span text:style-name="T5"> SDK der Lovense Cam Extension. Dieses SDK ist primär darauf ausgelegt, mit der installierten Lovense Software (Connect oder Browser-Extension) zu kommunizieren, anstatt das Bluetooth-Protokoll selbst zu steuern.</text:span></text:p>
          </text:list-item>
        </text:list>
        <text:h text:style-name="P60" text:outline-level="3">3. Die Lovense Browser Extension</text:h>
        <text:p text:style-name="P62">Zusätzlich zur Connect-App gibt es eine <text:span text:style-name="T3">Chrome/Edge Extension</text:span>.</text:p>
        <text:list text:style-name="L38">
          <text:list-item>
            <text:p text:style-name="P65">Diese dient oft als Bindeglied zwischen einer Webseite und der Lovense Connect Software (egal ob diese auf dem Handy oder dem PC läuft).</text:p>
          </text:list-item>
          <text:list-item>
            <text:p text:style-name="P66"><text:span text:style-name="T5">In deinem Code-Snippet (</text:span><text:span text:style-name="Source_20_Text"><text:span text:style-name="T6">window.LOVENSE_SITE_NAME</text:span></text:span><text:span text:style-name="T5">) wird genau diese Schnittstelle angesprochen.</text:span></text:p>
          </text:list-item>
        </text:list>
        <text:p text:style-name="P35"/>
        <text:h text:style-name="P60" text:outline-level="3">Was bedeutet das für dein Projekt?</text:h>
        <text:p text:style-name="P67"><text:span text:style-name="T5">Da du das </text:span><text:span text:style-name="Source_20_Text"><text:span text:style-name="T6">cam-extension/static/js-sdk/broadcast.js</text:span></text:span><text:span text:style-name="T5"> eingebunden hast, sieht der Workflow am PC normalerweise so aus:</text:span></text:p>
        <text:list text:style-name="L39">
          <text:list-item>
            <text:p text:style-name="P68"><text:span text:style-name="T3">Software:</text:span> Der User hat <text:span text:style-name="T3">Lovense Connect</text:span> auf dem PC gestartet (mit USB-Dongle).</text:p>
          </text:list-item>
          <text:list-item>
            <text:p text:style-name="P68"><text:span text:style-name="T3">Erkennung:</text:span> Die Software registriert das Toy.</text:p>
          </text:list-item>
          <text:list-item>
            <text:p text:style-name="P68"><text:span text:style-name="T3">Schnittstelle:</text:span> Dein JavaScript-Code sendet einen "Befehl" (z. B. einen simulierten Tip) an die lokale Schnittstelle.</text:p>
          </text:list-item>
          <text:list-item>
            <text:p text:style-name="P68"><text:span text:style-name="T3">Aktion:</text:span> Die Lovense-Software empfängt dies und lässt das Toy vibrieren.</text:p>
          </text:list-item>
        </text:list>
        <text:p text:style-name="P62"><text:soft-page-break/><text:span text:style-name="T3">Zusammenfassend:</text:span> Ja, es geht über den PC, aber für eine stabile Verbindung ohne Handy ist bei Lovense am Desktop fast immer der <text:span text:style-name="T3">spezielle USB-Bluetooth-Adapter</text:span> erforderlich, da die Standard-Bluetooth-Stacks von Windows die Toys oft nicht korrekt ansprechen können.</text:p>
        <text:h text:style-name="P60" text:outline-level="3">Kleiner Tipp für deinen Code:</text:h>
        <text:p text:style-name="P67"><text:span text:style-name="T5">Falls du testen willst, ob die Verbindung zum lokalen PC-Server steht, bietet Lovense oft eine lokale API-Antwort unter </text:span><text:span text:style-name="Source_20_Text"><text:span text:style-name="T6">[http://127.0.0.1:20010/status](http://127.0.0.1:20010/status)</text:span></text:span><text:span text:style-name="T5">. Wenn diese Adresse im Browser des Nutzers erreichbar ist, ist die PC-Software (Lovense Connect) aktiv und bereit.</text:span></text:p>
      </text:section>
      <text:p text:style-name="P31"/>
      <text:p text:style-name="P31"/>
      <text:p text:style-name="P31"/>
      <text:p text:style-name="P31"/>
      <text:p text:style-name="P31"/>
      <text:p text:style-name="P31">----</text:p>
      <text:p text:style-name="P31"/>
      <text:p text:style-name="P31"/>
      <text:p text:style-name="P69">OBS</text:p>
      <text:p text:style-name="P69"/>
      <text:p text:style-name="P69"/>
      <text:h text:style-name="P70" text:outline-level="2">Für das Manual des Hosts (Der Streamer mit OBS)</text:h>
      <text:p text:style-name="P71"><text:span text:style-name="T7">Der Host nutzt den </text:span><text:span text:style-name="T8">WHIP Ingest</text:span><text:span text:style-name="T7">-Pfad. In deinem Terminal steht: </text:span><text:span text:style-name="Source_20_Text"><text:span text:style-name="T7">http://localhost:8787/whip/:stream_key</text:span></text:span><text:span text:style-name="T7">. Das bedeutet für das Handbuch:</text:span></text:p>
      <text:list text:style-name="L40">
        <text:list-item>
          <text:p text:style-name="P72"><text:span text:style-name="T8">Der Server-Pfad:</text:span><text:span text:style-name="T7"> Sobald das System online ist, lautet die URL für OBS: </text:span><text:span text:style-name="Source_20_Text"><text:span text:style-name="T7">https://whip.tangent-club.com/whip/</text:span></text:span></text:p>
        </text:list-item>
        <text:list-item>
          <text:p text:style-name="P72"><text:span text:style-name="T8">Der Streaming-Schlüssel:</text:span><text:span text:style-name="T7"> Das </text:span><text:span text:style-name="Source_20_Text"><text:span text:style-name="T7">:stream_key</text:span></text:span><text:span text:style-name="T7"> am Ende ist der Platzhalter. In OBS trägt der Streamer die URL ein und gibt im Feld „Inhaber-Token“ (oder Stream Key) seinen persönlichen, professionellen Schlüssel (z. B. </text:span><text:span text:style-name="Source_20_Text"><text:span text:style-name="T7">live_tangent_771x92</text:span></text:span><text:span text:style-name="T7">) ein. OBS setzt das beim Senden automatisch richtig zusammen.</text:span></text:p>
        </text:list-item>
      </text:list>
      <text:h text:style-name="P73" text:outline-level="2">2. Für das Manual des Gastes (Der Zuschauer / Partner)</text:h>
      <text:p text:style-name="P71"><text:span text:style-name="T7">Hier wird es für dein P2P-Netzwerk interessant! Der Pfad </text:span><text:span text:style-name="Source_20_Text"><text:span text:style-name="T7">WHEP playback: ...</text:span></text:span><text:span text:style-name="T7"> zeigt, dass der Server das Video nicht nur empfangen, sondern auch per WebRTC wieder ausgeben kann.</text:span></text:p>
      <text:p text:style-name="P74">Da du aber ein <text:span text:style-name="T9">Peer-to-Peer-Netzwerk</text:span> (z. B. via PeerJS) betreibst, läuft das für die Gäste normalerweise so ab:</text:p>
      <text:list text:style-name="L41">
        <text:list-item>
          <text:p text:style-name="P75"><text:span text:style-name="T9">Der Host verbindet sich mit OBS</text:span> $\rightarrow$ das Signal landet auf deinem WHIP-Server.</text:p>
        </text:list-item>
        <text:list-item>
          <text:p text:style-name="P75"><text:span text:style-name="T9">Der Host öffnet deine Web-App</text:span> als „Host“ $\rightarrow$ seine Web-App holt sich das Video vom lokalen Server ab und wird zum <text:span text:style-name="T10">primären Peer</text:span>.</text:p>
        </text:list-item>
        <text:list-item>
          <text:p text:style-name="P75"><text:span text:style-name="T9">Der Gast</text:span> muss von diesem ganzen Server-Kram überhaupt nichts wissen! Er bekommt wie bisher einfach die <text:span text:style-name="T9">Peer-ID</text:span> des Hosts (oder klickt auf einen <text:soft-page-break/>Einladungslink). Der Gast verbindet sich direkt von Browser zu Browser (P2P) mit dem Host und zieht sich das Bild direkt von dessen Rechner, ohne den Server zu belasten.</text:p>
        </text:list-item>
      </text:list>
      <text:h text:style-name="P76" text:outline-level="3">Kurztipp fürs Handbuch:</text:h>
      <text:p text:style-name="P77">Anleitung für Streamer (OBS-Setup):</text:p>
      <text:list text:style-name="L42">
        <text:list-item>
          <text:p text:style-name="P78">Öffne OBS Studio und erstelle ein neues Profil (z. B. "Tangent-Club").</text:p>
        </text:list-item>
        <text:list-item>
          <text:p text:style-name="P78">Gehe zu <text:span text:style-name="T10">Einstellungen $\rightarrow$ Stream</text:span> und wähle bei Plattform <text:span text:style-name="T9">WHIP</text:span>.</text:p>
        </text:list-item>
        <text:list-item>
          <text:p text:style-name="P79"><text:span text:style-name="T7">Trage bei Server </text:span><text:span text:style-name="Source_20_Text"><text:span text:style-name="T7">https://whip.tangent-club.com/whip/</text:span></text:span><text:span text:style-name="T7"> ein.</text:span></text:p>
        </text:list-item>
        <text:list-item>
          <text:p text:style-name="P78">Trage bei Inhaber-Token deinen persönlichen Streaming-Schlüssel ein.</text:p>
        </text:list-item>
        <text:list-item>
          <text:p text:style-name="P78">Klicke auf <text:span text:style-name="T10">Stream starten</text:span> und starte danach die Übertragung in der Web-App.</text:p>
        </text:list-item>
      </text:list>
      <text:p text:style-name="P74">Jetzt steht deinem ersten Live-Test auf dem Rechner nichts mehr im Weg. Klick mal in OBS auf „<text:span text:style-name="T9">Stream starten“</text:span> – dann müsste der Server im Terminal anfangen, die Verbindung zu loggen!</text:p>
      <text:p text:style-name="P69"/>
      <text:p text:style-name="P69"/>
      <text:h text:style-name="P80" text:outline-level="3">1. Einmalige OBS-Fehlermeldungen ignorieren</text:h>
      <text:list text:style-name="L43">
        <text:list-item>
          <text:p text:style-name="P81"><text:span text:style-name="T9">Der Opus-Hinweis:</text:span> Beim ersten Umstellen auf WHIP meldet OBS, dass der Audio-Kodierer auf „Opus“ geändert wird. Hier einfach dauerhaft auf „<text:span text:style-name="T9">Ja“</text:span> klicken.</text:p>
        </text:list-item>
        <text:list-item>
          <text:p text:style-name="P82"><text:span text:style-name="T8">Der Aufnahmeformat-Fehler:</text:span><text:span text:style-name="T7"> Wenn OBS das Starten verweigert, weil kein kompatibles Aufnahmeformat gesetzt ist: In OBS unter </text:span><text:span text:style-name="T11">Einstellungen $\rightarrow$ Ausgabe $\rightarrow$ Aufnahme</text:span><text:span text:style-name="T7"> das Format auf </text:span><text:span text:style-name="Source_20_Text"><text:span text:style-name="T8">mp4</text:span></text:span><text:span text:style-name="T7"> oder </text:span><text:span text:style-name="Source_20_Text"><text:span text:style-name="T8">mkv</text:span></text:span><text:span text:style-name="T7"> umstellen.</text:span></text:p>
        </text:list-item>
      </text:list>
      <text:h text:style-name="P76" text:outline-level="3">2. Strikt an die Reihenfolge halten</text:h>
      <text:p text:style-name="P74">Der Server akzeptiert den Stream nur, wenn er vorher angemeldet wurde.</text:p>
      <text:list text:style-name="L44">
        <text:list-item>
          <text:p text:style-name="P83"><text:span text:style-name="T8">Zuerst</text:span><text:span text:style-name="T7"> auf der Webseite die Quelle auf </text:span><text:span text:style-name="Source_20_Text"><text:span text:style-name="T7">OBS Studio (WHIP)</text:span></text:span><text:span text:style-name="T7"> stellen und „</text:span><text:span text:style-name="T8">Start as Host“</text:span><text:span text:style-name="T7"> klicken.</text:span></text:p>
        </text:list-item>
        <text:list-item>
          <text:p text:style-name="P84"><text:span text:style-name="T9">Danach</text:span> erst in OBS auf „<text:span text:style-name="T9">Stream starten“</text:span> klicken.</text:p>
        </text:list-item>
      </text:list>
      <text:h text:style-name="P76" text:outline-level="3">3. Port-Blockade lösen (Falls der Server nicht startet)</text:h>
      <text:p text:style-name="P71"><text:span text:style-name="T7">Falls der Node.js-Server im Terminal mit </text:span><text:span text:style-name="Source_20_Text"><text:span text:style-name="T7">EADDRINUSE</text:span></text:span><text:span text:style-name="T7"> abbricht, läuft noch ein alter Prozess im Hintergrund. Befehl zum Freimachen:</text:span></text:p>
      <text:p text:style-name="P74"/>
      <text:p text:style-name="P74">kill -9 $(lsof -t -i:8787)</text:p>
      <text:p text:style-name="P6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4T10:46:52.469631000</meta:creation-date>
    <meta:generator>LibreOffice/26.2.2.2$MacOSX_AARCH64 LibreOffice_project/1f77d10d6938fd34972958f64b2bcfa54f8b1ba5</meta:generator>
    <dc:date>2026-05-30T15:58:23.762391000</dc:date>
    <meta:editing-duration>PT1H38M46S</meta:editing-duration>
    <meta:editing-cycles>8</meta:editing-cycles>
    <meta:document-statistic meta:table-count="0" meta:image-count="0" meta:object-count="0" meta:page-count="14" meta:paragraph-count="285" meta:word-count="1945" meta:character-count="12610" meta:non-whitespace-character-count="11081"/>
  </office:meta>
</office:document-meta>
</file>