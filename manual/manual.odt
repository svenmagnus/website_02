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Heading_20_3">
      <style:paragraph-properties fo:margin-top="0cm" fo:margin-bottom="0.247cm" style:contextual-spacing="false" fo:line-height="115%"/>
    </style:style>
    <style:style style:name="P8" style:family="paragraph" style:parent-style-name="Horizontal_20_Line">
      <style:paragraph-properties fo:margin-top="0cm" fo:margin-bottom="0.247cm" style:contextual-spacing="false" fo:line-height="115%"/>
    </style:style>
    <style:style style:name="P9" style:family="paragraph" style:parent-style-name="Heading_20_2">
      <style:paragraph-properties fo:margin-top="0cm" fo:margin-bottom="0.247cm" style:contextual-spacing="false" fo:line-height="115%"/>
    </style:style>
    <style:style style:name="P10" style:family="paragraph" style:parent-style-name="Text_20_body" style:list-style-name="L4"/>
    <style:style style:name="P11" style:family="paragraph" style:parent-style-name="Text_20_body" style:list-style-name="L5"/>
    <style:style style:name="P12" style:family="paragraph" style:parent-style-name="Heading_20_1">
      <style:paragraph-properties fo:margin-top="0cm" fo:margin-bottom="0.247cm" style:contextual-spacing="false" fo:line-height="115%"/>
    </style:style>
    <style:style style:name="P13" style:family="paragraph" style:parent-style-name="Text_20_body" style:list-style-name="L6"/>
    <style:style style:name="P14" style:family="paragraph" style:parent-style-name="Text_20_body">
      <style:text-properties officeooo:paragraph-rsid="00186e05"/>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Heading_20_2">
      <style:paragraph-properties fo:margin-top="0cm" fo:margin-bottom="0.247cm" style:contextual-spacing="false" fo:line-height="115%"/>
      <style:text-properties fo:font-size="24pt" officeooo:rsid="001b5234" officeooo:paragraph-rsid="001b5234" style:font-size-asian="24pt" style:font-size-complex="24pt"/>
    </style:style>
    <style:style style:name="P23" style:family="paragraph" style:parent-style-name="Text_20_body" style:list-style-name="L14"/>
    <style:style style:name="P24" style:family="paragraph" style:parent-style-name="Text_20_body">
      <style:paragraph-properties fo:margin-top="0cm" fo:margin-bottom="0.247cm" style:contextual-spacing="false" fo:line-height="115%"/>
    </style:style>
    <style:style style:name="P25" style:family="paragraph" style:parent-style-name="Heading_20_1">
      <style:paragraph-properties fo:margin-top="0cm" fo:margin-bottom="0.247cm" style:contextual-spacing="false" fo:line-height="115%"/>
      <style:text-properties fo:font-size="18pt" style:font-size-asian="18pt" style:font-size-complex="18pt"/>
    </style:style>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Standard">
      <style:text-properties officeooo:rsid="001a15d3" officeooo:paragraph-rsid="001a15d3"/>
    </style:style>
    <style:style style:name="P32" style:family="paragraph" style:parent-style-name="Heading_20_1">
      <style:text-properties officeooo:rsid="001a15d3" officeooo:paragraph-rsid="001a15d3"/>
    </style:style>
    <style:style style:name="P33" style:family="paragraph" style:parent-style-name="Text_20_body">
      <style:text-properties officeooo:rsid="001a15d3"/>
    </style:style>
    <style:style style:name="P34" style:family="paragraph" style:parent-style-name="Heading_20_3">
      <style:text-properties officeooo:rsid="001a15d3"/>
    </style:style>
    <style:style style:name="P35" style:family="paragraph" style:parent-style-name="Horizontal_20_Line">
      <style:text-properties officeooo:rsid="001a15d3"/>
    </style:style>
    <style:style style:name="P36" style:family="paragraph" style:parent-style-name="Heading_20_2">
      <style:text-properties officeooo:rsid="001a15d3"/>
    </style:style>
    <style:style style:name="P37" style:family="paragraph" style:parent-style-name="Text_20_body" style:list-style-name="L20">
      <style:text-properties officeooo:rsid="001a15d3"/>
    </style:style>
    <style:style style:name="P38" style:family="paragraph" style:parent-style-name="Text_20_body" style:list-style-name="L21">
      <style:text-properties officeooo:rsid="001a15d3"/>
    </style:style>
    <style:style style:name="P39" style:family="paragraph" style:parent-style-name="Heading_20_1">
      <style:text-properties officeooo:rsid="001a15d3"/>
    </style:style>
    <style:style style:name="P40" style:family="paragraph" style:parent-style-name="Text_20_body" style:list-style-name="L22">
      <style:text-properties officeooo:rsid="001a15d3"/>
    </style:style>
    <style:style style:name="P41" style:family="paragraph" style:parent-style-name="Text_20_body" style:list-style-name="L23">
      <style:text-properties officeooo:rsid="001a15d3"/>
    </style:style>
    <style:style style:name="P42" style:family="paragraph" style:parent-style-name="Text_20_body" style:list-style-name="L24">
      <style:text-properties officeooo:rsid="001a15d3"/>
    </style:style>
    <style:style style:name="P43" style:family="paragraph" style:parent-style-name="Text_20_body" style:list-style-name="L25">
      <style:text-properties officeooo:rsid="001a15d3"/>
    </style:style>
    <style:style style:name="P44" style:family="paragraph" style:parent-style-name="Text_20_body" style:list-style-name="L26">
      <style:text-properties officeooo:rsid="001a15d3"/>
    </style:style>
    <style:style style:name="P45" style:family="paragraph" style:parent-style-name="Text_20_body" style:list-style-name="L27">
      <style:text-properties officeooo:rsid="001a15d3"/>
    </style:style>
    <style:style style:name="P46" style:family="paragraph" style:parent-style-name="Text_20_body" style:list-style-name="L28">
      <style:text-properties officeooo:rsid="001a15d3"/>
    </style:style>
    <style:style style:name="P47" style:family="paragraph" style:parent-style-name="Text_20_body" style:list-style-name="L29">
      <style:text-properties officeooo:rsid="001a15d3"/>
    </style:style>
    <style:style style:name="P48" style:family="paragraph" style:parent-style-name="Heading_20_2">
      <style:text-properties fo:font-size="24pt" officeooo:rsid="001b5234" officeooo:paragraph-rsid="001b5234" style:font-size-asian="24pt" style:font-size-complex="24pt"/>
    </style:style>
    <style:style style:name="P49" style:family="paragraph" style:parent-style-name="Heading_20_3">
      <style:paragraph-properties fo:margin-top="0cm" fo:margin-bottom="0.247cm" style:contextual-spacing="false" fo:line-height="115%"/>
      <style:text-properties officeooo:rsid="001a15d3"/>
    </style:style>
    <style:style style:name="P50" style:family="paragraph" style:parent-style-name="Text_20_body" style:list-style-name="L30">
      <style:paragraph-properties fo:margin-top="0cm" fo:margin-bottom="0cm" style:contextual-spacing="false"/>
      <style:text-properties officeooo:rsid="001a15d3"/>
    </style:style>
    <style:style style:name="P51" style:family="paragraph" style:parent-style-name="Text_20_body" style:list-style-name="L30">
      <style:text-properties officeooo:rsid="001a15d3"/>
    </style:style>
    <style:style style:name="P52" style:family="paragraph" style:parent-style-name="Heading_20_1">
      <style:text-properties fo:font-size="18pt" officeooo:rsid="001a15d3" style:font-size-asian="18pt" style:font-size-complex="18pt"/>
    </style:style>
    <style:style style:name="P53" style:family="paragraph" style:parent-style-name="Text_20_body" style:list-style-name="L31">
      <style:text-properties officeooo:rsid="001a15d3"/>
    </style:style>
    <style:style style:name="P54" style:family="paragraph" style:parent-style-name="Text_20_body" style:list-style-name="L32">
      <style:text-properties officeooo:rsid="001a15d3"/>
    </style:style>
    <style:style style:name="P55" style:family="paragraph" style:parent-style-name="Text_20_body" style:list-style-name="L33">
      <style:text-properties officeooo:rsid="001a15d3"/>
    </style:style>
    <style:style style:name="P56" style:family="paragraph" style:parent-style-name="Text_20_body" style:list-style-name="L34">
      <style:text-properties officeooo:rsid="001a15d3"/>
    </style:style>
    <style:style style:name="P57" style:family="paragraph" style:parent-style-name="Text_20_body" style:list-style-name="L35">
      <style:text-properties officeooo:rsid="001a15d3"/>
    </style:style>
    <style:style style:name="P58" style:family="paragraph" style:parent-style-name="Text_20_body">
      <style:text-properties fo:color="#1f1f1f" loext:opacity="100%" style:font-name="Google Sans Text" officeooo:rsid="001a15d3" officeooo:paragraph-rsid="001a15d3"/>
    </style:style>
    <style:style style:name="P59" style:family="paragraph" style:parent-style-name="Text_20_body" style:master-page-name="">
      <style:paragraph-properties fo:margin-left="0cm" fo:margin-right="0cm" fo:margin-top="0cm" fo:margin-bottom="0.265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0"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officeooo:rsid="001a15d3"/>
    </style:style>
    <style:style style:name="P61" style:family="paragraph" style:parent-style-name="Text_20_body" style:list-style-name="L3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officeooo:rsid="001a15d3"/>
    </style:style>
    <style:style style:name="P65" style:family="paragraph" style:parent-style-name="Text_20_body" style:list-style-name="L38" style:master-page-name="">
      <style:paragraph-properties fo:margin-left="0cm" fo:margin-right="0cm" fo:margin-top="0cm" fo:margin-bottom="0.265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6" style:family="paragraph" style:parent-style-name="Text_20_body" style:list-style-name="L3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officeooo:rsid="001a15d3"/>
    </style:style>
    <style:style style:name="P67"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officeooo:rsid="001a15d3"/>
    </style:style>
    <style:style style:name="P68" style:family="paragraph" style:parent-style-name="Text_20_body" style:list-style-name="L3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officeooo:rsid="001a15d3"/>
    </style:style>
    <style:style style:name="P69" style:family="paragraph" style:parent-style-name="Standard">
      <style:text-properties officeooo:rsid="001d7fa5" officeooo:paragraph-rsid="001d7fa5"/>
    </style:style>
    <style:style style:name="P70" style:family="paragraph" style:parent-style-name="Heading_20_2">
      <style:text-properties style:font-name="Google Sans" officeooo:rsid="001d7fa5" officeooo:paragraph-rsid="001d7fa5"/>
    </style:style>
    <style:style style:name="P71" style:family="paragraph" style:parent-style-name="Text_20_body">
      <style:paragraph-properties fo:margin-left="0cm" fo:margin-right="0cm" fo:margin-top="0cm" fo:margin-bottom="0.247cm" style:contextual-spacing="false" fo:line-height="114%" fo:text-indent="0cm" style:auto-text-indent="false"/>
      <style:text-properties officeooo:rsid="001d7fa5"/>
    </style:style>
    <style:style style:name="P72" style:family="paragraph" style:parent-style-name="Text_20_body" style:list-style-name="L40">
      <style:paragraph-properties fo:margin-left="0cm" fo:margin-right="0cm" fo:margin-top="0cm" fo:margin-bottom="0.247cm" style:contextual-spacing="false" fo:line-height="114%" fo:text-indent="0cm" style:auto-text-indent="false" fo:padding="0cm" fo:border="none"/>
      <style:text-properties officeooo:rsid="001d7fa5"/>
    </style:style>
    <style:style style:name="P73" style:family="paragraph" style:parent-style-name="Heading_20_2">
      <style:paragraph-properties fo:margin-left="0cm" fo:margin-right="0cm" fo:margin-top="0cm" fo:margin-bottom="0.247cm" style:contextual-spacing="false" fo:line-height="114%" fo:text-indent="0cm" style:auto-text-indent="false"/>
      <style:text-properties style:font-name="Google Sans" officeooo:rsid="001d7fa5"/>
    </style:style>
    <style:style style:name="P7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officeooo:rsid="001d7fa5"/>
    </style:style>
    <style:style style:name="P75" style:family="paragraph" style:parent-style-name="Text_20_body" style:list-style-name="L41">
      <style:paragraph-properties fo:margin-left="0cm" fo:margin-right="0cm" fo:margin-top="0cm" fo:margin-bottom="0.247cm" style:contextual-spacing="false" fo:line-height="114%" fo:text-indent="0cm" style:auto-text-indent="false" fo:padding="0cm" fo:border="none"/>
      <style:text-properties style:font-name="Google Sans Text" officeooo:rsid="001d7fa5"/>
    </style:style>
    <style:style style:name="P76" style:family="paragraph" style:parent-style-name="Heading_20_3">
      <style:paragraph-properties fo:margin-left="0cm" fo:margin-right="0cm" fo:margin-top="0cm" fo:margin-bottom="0.247cm" style:contextual-spacing="false" fo:line-height="114%" fo:text-indent="0cm" style:auto-text-indent="false"/>
      <style:text-properties style:font-name="Google Sans" officeooo:rsid="001d7fa5"/>
    </style:style>
    <style:style style:name="P77"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fo:font-weight="bold" officeooo:rsid="001d7fa5"/>
    </style:style>
    <style:style style:name="P78" style:family="paragraph" style:parent-style-name="Quotations" style:list-style-name="L42">
      <style:paragraph-properties fo:margin-left="1cm" fo:margin-right="1cm" fo:margin-top="0cm" fo:margin-bottom="0.499cm" style:contextual-spacing="false" fo:line-height="114%" fo:text-indent="0cm" style:auto-text-indent="false" fo:padding="0cm" fo:border="none"/>
      <style:text-properties style:font-name="Google Sans Text" officeooo:rsid="001d7fa5"/>
    </style:style>
    <style:style style:name="P79" style:family="paragraph" style:parent-style-name="Quotations" style:list-style-name="L42">
      <style:paragraph-properties fo:margin-left="1cm" fo:margin-right="1cm" fo:margin-top="0cm" fo:margin-bottom="0.499cm" style:contextual-spacing="false" fo:line-height="114%" fo:text-indent="0cm" style:auto-text-indent="false" fo:padding="0cm" fo:border="none"/>
      <style:text-properties officeooo:rsid="001d7fa5"/>
    </style:style>
    <style:style style:name="P80" style:family="paragraph" style:parent-style-name="Heading_20_3">
      <style:text-properties style:font-name="Google Sans" officeooo:rsid="001d7fa5" officeooo:paragraph-rsid="001d7fa5"/>
    </style:style>
    <style:style style:name="P81"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text-properties style:font-name="Google Sans Text" officeooo:rsid="001d7fa5"/>
    </style:style>
    <style:style style:name="P82"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text-properties officeooo:rsid="001d7fa5"/>
    </style:style>
    <style:style style:name="P83" style:family="paragraph" style:parent-style-name="Text_20_body" style:list-style-name="L44">
      <style:paragraph-properties fo:margin-left="0cm" fo:margin-right="0cm" fo:margin-top="0cm" fo:margin-bottom="0.247cm" style:contextual-spacing="false" fo:line-height="114%" fo:text-indent="0cm" style:auto-text-indent="false" fo:padding="0cm" fo:border="none"/>
      <style:text-properties officeooo:rsid="001d7fa5"/>
    </style:style>
    <style:style style:name="P84" style:family="paragraph" style:parent-style-name="Text_20_body" style:list-style-name="L44">
      <style:paragraph-properties fo:margin-left="0cm" fo:margin-right="0cm" fo:margin-top="0cm" fo:margin-bottom="0.247cm" style:contextual-spacing="false" fo:line-height="114%" fo:text-indent="0cm" style:auto-text-indent="false" fo:padding="0cm" fo:border="none"/>
      <style:text-properties style:font-name="Google Sans Text" officeooo:rsid="001d7fa5"/>
    </style:style>
    <style:style style:name="P85" style:family="paragraph" style:parent-style-name="Text_20_body">
      <style:text-properties officeooo:rsid="001d7fa5"/>
    </style:style>
    <style:style style:name="P86" style:family="paragraph" style:parent-style-name="Heading_20_3">
      <style:text-properties officeooo:rsid="001d7fa5"/>
    </style:style>
    <style:style style:name="P87" style:family="paragraph" style:parent-style-name="Text_20_body" style:list-style-name="L45">
      <style:paragraph-properties fo:margin-top="0cm" fo:margin-bottom="0cm" style:contextual-spacing="false"/>
      <style:text-properties officeooo:rsid="001d7fa5"/>
    </style:style>
    <style:style style:name="P88" style:family="paragraph" style:parent-style-name="Text_20_body" style:list-style-name="L45">
      <style:text-properties officeooo:rsid="001d7fa5"/>
    </style:style>
    <style:style style:name="P89" style:family="paragraph" style:parent-style-name="Preformatted_20_Text">
      <style:paragraph-properties fo:margin-left="0cm" fo:margin-right="0cm" fo:margin-top="0cm" fo:margin-bottom="0.499cm" style:contextual-spacing="false" fo:text-indent="0cm" style:auto-text-indent="false"/>
      <style:text-properties officeooo:rsid="001d7fa5"/>
    </style:style>
    <style:style style:name="P90" style:family="paragraph" style:parent-style-name="Preformatted_20_Text">
      <style:paragraph-properties fo:margin-left="0cm" fo:margin-right="0cm" fo:text-indent="0cm" style:auto-text-indent="false"/>
      <style:text-properties officeooo:rsid="001d7fa5"/>
    </style:style>
    <style:style style:name="P91" style:family="paragraph" style:parent-style-name="Preformatted_20_Text">
      <style:text-properties officeooo:rsid="001d7fa5"/>
    </style:style>
    <style:style style:name="P92" style:family="paragraph" style:parent-style-name="Preformatted_20_Text">
      <style:paragraph-properties fo:margin-top="0cm" fo:margin-bottom="0.499cm" style:contextual-spacing="false"/>
      <style:text-properties officeooo:rsid="001d7fa5"/>
    </style:style>
    <style:style style:name="P93" style:family="paragraph" style:parent-style-name="Standard">
      <style:text-properties officeooo:paragraph-rsid="0021632d"/>
    </style:style>
    <style:style style:name="P94" style:family="paragraph" style:parent-style-name="Standard">
      <style:text-properties officeooo:rsid="0021632d" officeooo:paragraph-rsid="0021632d"/>
    </style:style>
    <style:style style:name="P95" style:family="paragraph" style:parent-style-name="Heading_20_3">
      <style:text-properties officeooo:rsid="0021632d" officeooo:paragraph-rsid="0021632d"/>
    </style:style>
    <style:style style:name="P96" style:family="paragraph" style:parent-style-name="Text_20_body" style:list-style-name="L46">
      <style:paragraph-properties fo:margin-top="0cm" fo:margin-bottom="0cm" style:contextual-spacing="false"/>
      <style:text-properties officeooo:rsid="0021632d"/>
    </style:style>
    <style:style style:name="P97" style:family="paragraph" style:parent-style-name="Text_20_body" style:list-style-name="L46">
      <style:text-properties officeooo:rsid="0021632d"/>
    </style:style>
    <style:style style:name="P98" style:family="paragraph" style:parent-style-name="Text_20_body">
      <style:text-properties officeooo:rsid="0021632d" officeooo:paragraph-rsid="0021632d"/>
    </style:style>
    <style:style style:name="P99" style:family="paragraph" style:parent-style-name="Text_20_body">
      <style:text-properties officeooo:rsid="0021632d"/>
    </style:style>
    <style:style style:name="P100" style:family="paragraph" style:parent-style-name="Heading_20_3">
      <style:text-properties officeooo:rsid="0021632d"/>
    </style:style>
    <style:style style:name="P101" style:family="paragraph" style:parent-style-name="Heading_20_1">
      <style:text-properties officeooo:rsid="0021632d" officeooo:paragraph-rsid="0021632d"/>
    </style:style>
    <style:style style:name="P102" style:family="paragraph" style:parent-style-name="Heading_20_2">
      <style:text-properties officeooo:rsid="0021632d"/>
    </style:style>
    <style:style style:name="P103" style:family="paragraph" style:parent-style-name="Standard">
      <style:text-properties fo:font-size="18pt" officeooo:rsid="00265dcc" officeooo:paragraph-rsid="00265dcc" style:font-size-asian="18pt" style:font-size-complex="18pt"/>
    </style:style>
    <style:style style:name="P104" style:family="paragraph" style:parent-style-name="Standard">
      <style:text-properties fo:font-style="italic" officeooo:rsid="0021632d" officeooo:paragraph-rsid="0021632d"/>
    </style:style>
    <style:style style:name="P105" style:family="paragraph" style:parent-style-name="Standard">
      <style:text-properties fo:font-size="18pt" fo:font-style="italic" officeooo:rsid="00283a35" officeooo:paragraph-rsid="00283a35" style:font-size-asian="18pt" style:font-size-complex="18pt"/>
    </style:style>
    <style:style style:name="P106" style:family="paragraph" style:parent-style-name="Standard">
      <style:text-properties fo:font-style="italic" officeooo:rsid="00283a35" officeooo:paragraph-rsid="00283a35"/>
    </style:style>
    <style:style style:name="P107" style:family="paragraph" style:parent-style-name="Text_20_body">
      <style:text-properties fo:font-style="italic" officeooo:rsid="00283a35" officeooo:paragraph-rsid="00283a35"/>
    </style:style>
    <style:style style:name="P108" style:family="paragraph" style:parent-style-name="Text_20_body">
      <style:text-properties fo:font-style="italic" officeooo:rsid="00283a35"/>
    </style:style>
    <style:style style:name="P109" style:family="paragraph" style:parent-style-name="Heading_20_2">
      <style:text-properties fo:font-style="italic" officeooo:rsid="00283a35"/>
    </style:style>
    <style:style style:name="P110" style:family="paragraph" style:parent-style-name="Text_20_body" style:list-style-name="L47">
      <style:text-properties fo:font-style="italic" officeooo:rsid="00283a35"/>
    </style:style>
    <style:style style:name="P111" style:family="paragraph" style:parent-style-name="Text_20_body" style:list-style-name="L48">
      <style:text-properties fo:font-style="italic" officeooo:rsid="00283a35"/>
    </style:style>
    <style:style style:name="P112" style:family="paragraph" style:parent-style-name="Text_20_body" style:list-style-name="L48">
      <style:text-properties fo:font-style="italic" fo:font-weight="bold" officeooo:rsid="00283a35"/>
    </style:style>
    <style:style style:name="P113" style:family="paragraph" style:parent-style-name="Text_20_body" style:list-style-name="L49">
      <style:text-properties fo:font-style="italic" officeooo:rsid="00283a35"/>
    </style:style>
    <style:style style:name="P114" style:family="paragraph" style:parent-style-name="Text_20_body" style:list-style-name="L50">
      <style:text-properties fo:font-style="italic" officeooo:rsid="00283a35"/>
    </style:style>
    <style:style style:name="P115" style:family="paragraph" style:parent-style-name="Text_20_body" style:list-style-name="L51">
      <style:text-properties fo:font-style="italic" officeooo:rsid="00283a35"/>
    </style:style>
    <style:style style:name="P116" style:family="paragraph" style:parent-style-name="Text_20_body">
      <style:paragraph-properties fo:margin-left="0cm" fo:margin-right="0cm" fo:margin-top="0cm" fo:margin-bottom="0cm" style:contextual-spacing="false" fo:text-indent="0cm" style:auto-text-indent="false" style:writing-mode="lr-tb"/>
      <style:text-properties fo:color="#1f1f1f" loext:opacity="100%" fo:font-style="italic" officeooo:rsid="00283a35" loext:padding="0cm" loext:border="none"/>
    </style:style>
    <style:style style:name="P117" style:family="paragraph" style:parent-style-name="Text_20_body">
      <style:paragraph-properties fo:margin-left="0cm" fo:margin-right="0cm" fo:margin-top="0cm" fo:margin-bottom="0cm" style:contextual-spacing="false" fo:text-indent="0cm" style:auto-text-indent="false"/>
      <style:text-properties fo:font-style="italic" officeooo:rsid="00283a35"/>
    </style:style>
    <style:style style:name="P118" style:family="paragraph" style:parent-style-name="Text_20_body">
      <style:paragraph-properties fo:margin-left="0cm" fo:margin-right="0cm" fo:margin-top="0cm" fo:margin-bottom="0cm" style:contextual-spacing="false" fo:text-indent="0cm" style:auto-text-indent="false"/>
      <style:text-properties fo:font-style="italic" officeooo:rsid="00283a35" loext:padding="0cm" loext:border="none"/>
    </style:style>
    <style:style style:name="P119" style:family="paragraph" style:parent-style-name="Heading_20_2">
      <style:paragraph-properties fo:margin-left="0cm" fo:margin-right="0cm" fo:margin-top="0.635cm" fo:margin-bottom="0cm" style:contextual-spacing="false" fo:text-indent="0cm" style:auto-text-indent="false"/>
      <style:text-properties fo:font-style="italic" officeooo:rsid="00283a35" loext:padding="0cm" loext:border="none"/>
    </style:style>
    <style:style style:name="P120" style:family="paragraph" style:parent-style-name="Text_20_body" style:list-style-name="L52">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21" style:family="paragraph" style:parent-style-name="Text_20_body" style:list-style-name="L52">
      <style:paragraph-properties fo:margin-left="0cm" fo:margin-right="0cm" fo:margin-top="0cm" fo:margin-bottom="0cm" style:contextual-spacing="false" fo:text-indent="0cm" style:auto-text-indent="false" fo:padding="0cm" fo:border="none"/>
      <style:text-properties fo:font-style="italic" officeooo:rsid="00283a35"/>
    </style:style>
    <style:style style:name="P122" style:family="paragraph" style:parent-style-name="Heading_20_3">
      <style:paragraph-properties fo:margin-left="0cm" fo:margin-right="0cm" fo:margin-top="0.635cm" fo:margin-bottom="0cm" style:contextual-spacing="false" fo:text-indent="0cm" style:auto-text-indent="false"/>
      <style:text-properties fo:font-style="italic" officeooo:rsid="00283a35" loext:padding="0cm" loext:border="none"/>
    </style:style>
    <style:style style:name="P123" style:family="paragraph" style:parent-style-name="Text_20_body" style:list-style-name="L53">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24" style:family="paragraph" style:parent-style-name="Text_20_body" style:list-style-name="L54">
      <style:paragraph-properties fo:margin-left="0cm" fo:margin-right="0cm" fo:margin-top="0cm" fo:margin-bottom="0cm" style:contextual-spacing="false" fo:text-indent="0cm" style:auto-text-indent="false" fo:padding="0cm" fo:border="none"/>
      <style:text-properties fo:font-style="italic" officeooo:rsid="00283a35"/>
    </style:style>
    <style:style style:name="P125" style:family="paragraph" style:parent-style-name="Text_20_body" style:list-style-name="L54">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26" style:family="paragraph" style:parent-style-name="Standard">
      <style:paragraph-properties fo:margin-left="1.376cm" fo:margin-right="0cm" fo:margin-top="0cm" fo:margin-bottom="0cm" style:contextual-spacing="false" fo:text-indent="0cm" style:auto-text-indent="false"/>
    </style:style>
    <style:style style:name="P127" style:family="paragraph" style:parent-style-name="Text_20_body" style:list-style-name="L55">
      <style:paragraph-properties fo:margin-left="0cm" fo:margin-right="0cm" fo:margin-top="0cm" fo:margin-bottom="0cm" style:contextual-spacing="false" fo:text-indent="0cm" style:auto-text-indent="false" fo:padding="0cm" fo:border="none"/>
      <style:text-properties fo:font-style="italic" officeooo:rsid="00283a35"/>
    </style:style>
    <style:style style:name="P128" style:family="paragraph" style:parent-style-name="Text_20_body" style:list-style-name="L55">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29" style:family="paragraph" style:parent-style-name="Text_20_body" style:list-style-name="L56">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30" style:family="paragraph" style:parent-style-name="Text_20_body" style:list-style-name="L57">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31" style:family="paragraph" style:parent-style-name="Quotations" style:list-style-name="L57">
      <style:paragraph-properties fo:margin-left="1cm" fo:margin-right="1cm" fo:margin-top="0cm" fo:margin-bottom="0cm" style:contextual-spacing="false" fo:text-indent="0cm" style:auto-text-indent="false" fo:padding="0cm" fo:border="none"/>
      <style:text-properties fo:font-style="italic" officeooo:rsid="00283a35" loext:padding="0cm" loext:border="none"/>
    </style:style>
    <style:style style:name="P132" style:family="paragraph" style:parent-style-name="Standard">
      <style:text-properties fo:font-size="16pt" fo:font-style="italic" officeooo:rsid="00283a35" officeooo:paragraph-rsid="00283a35" style:font-size-asian="16pt" style:font-size-complex="16pt"/>
    </style:style>
    <style:style style:name="P133" style:family="paragraph" style:parent-style-name="Text_20_body">
      <style:text-properties fo:color="#1f1f1f" loext:opacity="100%" fo:font-size="16pt" fo:font-style="italic" officeooo:rsid="00283a35" officeooo:paragraph-rsid="00283a35" style:font-size-asian="16pt" style:font-size-complex="16pt" loext:padding="0cm" loext:border="none"/>
    </style:style>
    <style:style style:name="P134" style:family="paragraph" style:parent-style-name="Text_20_body" style:list-style-name="L58">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35" style:family="paragraph" style:parent-style-name="Text_20_body" style:list-style-name="L58">
      <style:paragraph-properties fo:margin-left="0cm" fo:margin-right="0cm" fo:margin-top="0cm" fo:margin-bottom="0cm" style:contextual-spacing="false" fo:text-indent="0cm" style:auto-text-indent="false" fo:padding="0cm" fo:border="none"/>
      <style:text-properties fo:font-style="italic" officeooo:rsid="00283a35"/>
    </style:style>
    <style:style style:name="P136" style:family="paragraph" style:parent-style-name="Text_20_body" style:list-style-name="L59">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P137" style:family="paragraph" style:parent-style-name="Text_20_body" style:list-style-name="L60">
      <style:paragraph-properties fo:margin-left="0cm" fo:margin-right="0cm" fo:margin-top="0cm" fo:margin-bottom="0cm" style:contextual-spacing="false" fo:text-indent="0cm" style:auto-text-indent="false" fo:padding="0cm" fo:border="none"/>
      <style:text-properties fo:font-style="italic" officeooo:rsid="00283a35" loext:padding="0cm" loext:border="none"/>
    </style:style>
    <style:style style:name="T1" style:family="text">
      <style:text-properties officeooo:rsid="00186e05"/>
    </style:style>
    <style:style style:name="T2" style:family="text">
      <style:text-properties officeooo:rsid="001a15d3"/>
    </style:style>
    <style:style style:name="T3" style:family="text">
      <style:text-properties fo:font-weight="bold" loext:padding="0cm" loext:border="none"/>
    </style:style>
    <style:style style:name="T4" style:family="text">
      <style:text-properties fo:color="#1f1f1f" loext:opacity="100%" style:font-name="Google Sans Text" fo:font-weight="bold" loext:padding="0cm" loext:border="none"/>
    </style:style>
    <style:style style:name="T5" style:family="text">
      <style:text-properties fo:color="#1f1f1f" loext:opacity="100%" style:font-name="Google Sans Text"/>
    </style:style>
    <style:style style:name="T6" style:family="text">
      <style:text-properties fo:color="#444746" loext:opacity="100%" style:font-name="Google Sans Text" loext:padding="0cm" loext:border="none"/>
    </style:style>
    <style:style style:name="T7" style:family="text">
      <style:text-properties style:font-name="Google Sans Text"/>
    </style:style>
    <style:style style:name="T8" style:family="text">
      <style:text-properties style:font-name="Google Sans Text" fo:font-weight="bold"/>
    </style:style>
    <style:style style:name="T9" style:family="text">
      <style:text-properties fo:font-weight="bold"/>
    </style:style>
    <style:style style:name="T10" style:family="text">
      <style:text-properties fo:font-style="italic"/>
    </style:style>
    <style:style style:name="T11" style:family="text">
      <style:text-properties style:font-name="Google Sans Text" fo:font-style="italic"/>
    </style:style>
    <style:style style:name="T12" style:family="text">
      <style:text-properties officeooo:rsid="0021632d"/>
    </style:style>
    <style:style style:name="T13" style:family="text">
      <style:text-properties officeooo:rsid="0022c8d6"/>
    </style:style>
    <style:style style:name="T14" style:family="text">
      <style:text-properties fo:font-variant="normal" fo:text-transform="none" fo:font-style="normal"/>
    </style:style>
    <style:style style:name="T15" style:family="text">
      <style:text-properties loext:padding="0cm" loext:border="none"/>
    </style:style>
    <style:style style:name="T16" style:family="text">
      <style:text-properties fo:font-variant="normal" fo:text-transform="none"/>
    </style:style>
    <style:style style:name="T17" style:family="text">
      <style:text-properties officeooo:rsid="002cdd3e"/>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e-to-One-Videochat-App</text:h>
      <text:p text:style-name="Standard"/>
      <text:p text:style-name="Standard"/>
      <text:h text:style-name="Heading_20_1" text:outline-level="1">Anleitung zur Nutzung der One-to-One-Videochat-App</text:h>
      <text:h text:style-name="Heading_20_2" text:outline-level="2">1. App öffnen</text:h>
      <text:list text:style-name="L1">
        <text:list-item>
          <text:p text:style-name="P1">Öffne die Videochat-App im Browser. </text:p>
        </text:list-item>
        <text:list-item>
          <text:p text:style-name="P2">Erlaube den Zugriff auf Kamera und Mikrofon. </text:p>
        </text:list-item>
      </text:list>
      <text:h text:style-name="Heading_20_2" text:outline-level="2">2. Raum erstellen oder beitreten</text:h>
      <text:list text:style-name="L2">
        <text:list-item>
          <text:p text:style-name="P3">Gib deinen Namen ein. </text:p>
        </text:list-item>
        <text:list-item>
          <text:p text:style-name="P3">Erstelle einen neuen Raum oder nutze einen vorhandenen Einladungslink. </text:p>
        </text:list-item>
        <text:list-item>
          <text:p text:style-name="P4">Teile den Link mit der anderen Person. </text:p>
        </text:list-item>
      </text:list>
      <text:h text:style-name="Heading_20_2" text:outline-level="2">3. Videoanruf starten</text:h>
      <text:list text:style-name="L3">
        <text:list-item>
          <text:p text:style-name="P5">Sobald beide Teilnehmer im Raum sind, startet die Verbindung automatisch. </text:p>
        </text:list-item>
        <text:list-item>
          <text:p text:style-name="P6">Prüfe, ob Kamera und Mikrofon aktiviert sind. </text:p>
        </text:list-item>
      </text:list>
      <text:h text:style-name="Heading_20_2" text:outline-level="2">4. Während des Gesprächs</text:h>
      <text:h text:style-name="Heading_20_2" text:outline-level="2">Einladungsmail</text:h>
      <text:p text:style-name="Text_20_body">Betreff: Einladung zum privaten Videochat</text:p>
      <text:p text:style-name="Text_20_body">Hallo,</text:p>
      <text:p text:style-name="Text_20_body">du bist zu einem privaten One-to-One-Videochat eingeladen.</text:p>
      <text:h text:style-name="P7" text:outline-level="3">Zugangsdaten</text:h>
      <text:p text:style-name="Text_20_body"><text:span text:style-name="Strong_20_Emphasis">Login-Seite:</text:span><text:line-break/><text:a xlink:type="simple" xlink:href="https://svenmagnus.github.io/website_02/?utm_source=chatgpt.com" text:style-name="Internet_20_link" text:visited-style-name="Visited_20_Internet_20_Link">Videochat Login</text:a></text:p>
      <text:p text:style-name="Text_20_body"><text:span text:style-name="Strong_20_Emphasis">Passwort:</text:span><text:line-break/><text:span text:style-name="Source_20_Text">[PASSWORT: </text:span><text:span text:style-name="Source_20_Text"><text:span text:style-name="T1">Velvet_Touch</text:span></text:span><text:span text:style-name="Source_20_Text">]</text:span></text:p>
      <text:p text:style-name="Text_20_body"><text:span text:style-name="Strong_20_Emphasis">Peer-ID des Hosts:</text:span><text:line-break/><text:span text:style-name="Source_20_Text">[PEER-ID HIER EINTRAGEN]</text:span></text:p>
      <text:p text:style-name="P8"/>
      <text:h text:style-name="P9" text:outline-level="2"><text:soft-page-break/>So verbindest du dich</text:h>
      <text:list text:style-name="L4">
        <text:list-item>
          <text:p text:style-name="P10">Öffne den Link zur Videochat-Seite.</text:p>
        </text:list-item>
        <text:list-item>
          <text:p text:style-name="P10">Erlaube Kamera- und Mikrofonzugriff im Browser.</text:p>
        </text:list-item>
        <text:list-item>
          <text:p text:style-name="P10">Gib das Passwort ein.</text:p>
        </text:list-item>
        <text:list-item>
          <text:p text:style-name="P10">Klicke auf:<text:line-break/><text:span text:style-name="Strong_20_Emphasis">„Mit Host verbinden“</text:span></text:p>
        </text:list-item>
        <text:list-item>
          <text:p text:style-name="P10">Füge die Peer-ID des Hosts in das Feld:<text:line-break/><text:span text:style-name="Strong_20_Emphasis">„ID vom Host einfügen …“</text:span><text:line-break/>ein.</text:p>
        </text:list-item>
        <text:list-item>
          <text:p text:style-name="P10">Nach wenigen Sekunden sollte die Verbindung aktiv sein.</text:p>
        </text:list-item>
      </text:list>
      <text:p text:style-name="P8"/>
      <text:h text:style-name="P9" text:outline-level="2">Hinweise</text:h>
      <text:list text:style-name="L5">
        <text:list-item>
          <text:p text:style-name="P11">Funktioniert am besten mit:</text:p>
          <text:list>
            <text:list-item>
              <text:p text:style-name="P11"><text:a xlink:type="simple" xlink:href="https://www.google.com/chrome/?utm_source=chatgpt.com" text:style-name="Internet_20_link" text:visited-style-name="Visited_20_Internet_20_Link">Google Chrome</text:a></text:p>
            </text:list-item>
            <text:list-item>
              <text:p text:style-name="P11"><text:a xlink:type="simple" xlink:href="https://www.microsoft.com/edge?utm_source=chatgpt.com" text:style-name="Internet_20_link" text:visited-style-name="Visited_20_Internet_20_Link">Microsoft Edge</text:a></text:p>
            </text:list-item>
          </text:list>
        </text:list-item>
        <text:list-item>
          <text:p text:style-name="P11">Bitte stabile Internetverbindung verwenden.</text:p>
        </text:list-item>
        <text:list-item>
          <text:p text:style-name="P11">Kamera und Mikrofon müssen im Browser erlaubt sein.</text:p>
        </text:list-item>
      </text:list>
      <text:p text:style-name="Text_20_body">Viele Grüße</text:p>
      <text:h text:style-name="P12" text:outline-level="1">Benutzerhandbuch – One-to-One-Videochat-App</text:h>
      <text:h text:style-name="P9" text:outline-level="2">1. Zweck der Anwendung</text:h>
      <text:p text:style-name="Text_20_body">Die Anwendung ermöglicht einen direkten privaten Videochat zwischen zwei Personen über eine Peer-to-Peer-Verbindung.</text:p>
      <text:p text:style-name="Text_20_body">Es gibt:</text:p>
      <text:list text:style-name="L6">
        <text:list-item>
          <text:p text:style-name="P13">einen <text:span text:style-name="Strong_20_Emphasis">Host</text:span></text:p>
        </text:list-item>
        <text:list-item>
          <text:p text:style-name="P13">einen <text:span text:style-name="Strong_20_Emphasis">Gast / Teilnehmer</text:span></text:p>
        </text:list-item>
      </text:list>
      <text:p text:style-name="P14">Der Host erstellt die Verbindung. <text:line-break/>Der Teilnehmer verbindet sich über die Peer-ID des Hosts.</text:p>
      <text:p text:style-name="P8"/>
      <text:h text:style-name="P12" text:outline-level="1">2. Voraussetzungen</text:h>
      <text:p text:style-name="Text_20_body">Empfohlene Browser:</text:p>
      <text:list text:style-name="L7">
        <text:list-item>
          <text:p text:style-name="P15"><text:a xlink:type="simple" xlink:href="https://www.google.com/chrome/?utm_source=chatgpt.com" text:style-name="Internet_20_link" text:visited-style-name="Visited_20_Internet_20_Link"><text:soft-page-break/>Google Chrome</text:a></text:p>
        </text:list-item>
        <text:list-item>
          <text:p text:style-name="P15"><text:a xlink:type="simple" xlink:href="https://www.microsoft.com/edge?utm_source=chatgpt.com" text:style-name="Internet_20_link" text:visited-style-name="Visited_20_Internet_20_Link">Microsoft Edge</text:a></text:p>
        </text:list-item>
      </text:list>
      <text:p text:style-name="Text_20_body">Erforderlich:</text:p>
      <text:list text:style-name="L8">
        <text:list-item>
          <text:p text:style-name="P16">Kamera</text:p>
        </text:list-item>
        <text:list-item>
          <text:p text:style-name="P16">Mikrofon</text:p>
        </text:list-item>
        <text:list-item>
          <text:p text:style-name="P16">stabile Internetverbindung</text:p>
        </text:list-item>
      </text:list>
      <text:p text:style-name="P8"/>
      <text:h text:style-name="P12" text:outline-level="1">3. Oberfläche der App</text:h>
      <text:p text:style-name="Text_20_body">Die Oberfläche besteht aus mehreren Bereichen:</text:p>
      <text:h text:style-name="P9" text:outline-level="2">Lokales Kamerabild („DU“)</text:h>
      <text:p text:style-name="Text_20_body">Zeigt das eigene Kamerabild.</text:p>
      <text:h text:style-name="P9" text:outline-level="2">Gegenüber („REMOTE“)</text:h>
      <text:p text:style-name="Text_20_body">Zeigt den verbundenen Gesprächspartner.</text:p>
      <text:h text:style-name="P9" text:outline-level="2">Verbindungsbereich</text:h>
      <text:p text:style-name="Text_20_body">Hier wird die Verbindung aufgebaut:</text:p>
      <text:list text:style-name="L9">
        <text:list-item>
          <text:p text:style-name="P17">Als Host starten</text:p>
        </text:list-item>
        <text:list-item>
          <text:p text:style-name="P17">Mit Host verbinden</text:p>
        </text:list-item>
        <text:list-item>
          <text:p text:style-name="P17">Trennen</text:p>
        </text:list-item>
      </text:list>
      <text:h text:style-name="P9" text:outline-level="2">Peer-ID</text:h>
      <text:p text:style-name="Text_20_body">Jeder Host erhält automatisch eine eindeutige Peer-ID.</text:p>
      <text:p text:style-name="Text_20_body">Diese muss an den Gesprächspartner weitergegeben werden.</text:p>
      <text:p text:style-name="P8"/>
      <text:h text:style-name="P12" text:outline-level="1">4. Verbindung als Host herstellen</text:h>
      <text:h text:style-name="P9" text:outline-level="2">Schritt-für-Schritt</text:h>
      <text:list text:style-name="L10">
        <text:list-item>
          <text:p text:style-name="P18">Öffne die App:<text:line-break/><text:a xlink:type="simple" xlink:href="https://svenmagnus.github.io/website_02/?utm_source=chatgpt.com" text:style-name="Internet_20_link" text:visited-style-name="Visited_20_Internet_20_Link">Videochat App</text:a></text:p>
        </text:list-item>
        <text:list-item>
          <text:p text:style-name="P18">Kamera- und Mikrofonzugriff erlauben.</text:p>
        </text:list-item>
        <text:list-item>
          <text:p text:style-name="P18">Klicke auf:<text:line-break/><text:span text:style-name="Strong_20_Emphasis">„Als Host starten“</text:span></text:p>
        </text:list-item>
        <text:list-item>
          <text:p text:style-name="P18"><text:soft-page-break/>Unten erscheint:<text:line-break/><text:span text:style-name="Strong_20_Emphasis">„Deine aktuelle Peer-ID“</text:span></text:p>
        </text:list-item>
        <text:list-item>
          <text:p text:style-name="P18">Sende diese Peer-ID an den Teilnehmer.</text:p>
        </text:list-item>
        <text:list-item>
          <text:p text:style-name="P18">Warte auf die eingehende Verbindung.</text:p>
        </text:list-item>
      </text:list>
      <text:p text:style-name="P8"/>
      <text:h text:style-name="P12" text:outline-level="1">5. Verbindung als Teilnehmer herstellen</text:h>
      <text:list text:style-name="L11">
        <text:list-item>
          <text:p text:style-name="P19">Öffne den Einladungslink.</text:p>
        </text:list-item>
        <text:list-item>
          <text:p text:style-name="P19">Kamera- und Mikrofonzugriff erlauben.</text:p>
        </text:list-item>
        <text:list-item>
          <text:p text:style-name="P19">Klicke:<text:line-break/><text:span text:style-name="Strong_20_Emphasis">„Mit Host verbinden“</text:span></text:p>
        </text:list-item>
        <text:list-item>
          <text:p text:style-name="P19">Füge die Peer-ID des Hosts in das Eingabefeld ein.</text:p>
        </text:list-item>
        <text:list-item>
          <text:p text:style-name="P19">Die Verbindung wird automatisch aufgebaut.</text:p>
        </text:list-item>
      </text:list>
      <text:p text:style-name="P8"/>
      <text:h text:style-name="P12" text:outline-level="1">6. Ansichtsmodi</text:h>
      <text:p text:style-name="Text_20_body">Die App unterstützt verschiedene Darstellungen:</text:p>
      <text:list text:style-name="L12">
        <text:list-item>
          <text:p text:style-name="P20">Nebeneinander</text:p>
        </text:list-item>
        <text:list-item>
          <text:p text:style-name="P20">PiP Gegenüber groß</text:p>
        </text:list-item>
        <text:list-item>
          <text:p text:style-name="P20">PiP Du groß</text:p>
        </text:list-item>
      </text:list>
      <text:p text:style-name="Text_20_body">Zusätzlich kann die Position des PiP-Fensters gewählt werden:</text:p>
      <text:list text:style-name="L13">
        <text:list-item>
          <text:p text:style-name="P21">unten rechts</text:p>
        </text:list-item>
        <text:list-item>
          <text:p text:style-name="P21">andere Positionen je nach Einstellung</text:p>
        </text:list-item>
      </text:list>
      <text:p text:style-name="P8"/>
      <text:h text:style-name="P22" text:outline-level="2">7. Lovense Toy Anbindung</text:h>
      <text:h text:style-name="P7" text:outline-level="3">Verbinde dein Lovense Toy</text:h>
      <text:p text:style-name="Text_20_body">Bevor die Session startet:</text:p>
      <text:list text:style-name="L14">
        <text:list-item>
          <text:p text:style-name="P23">Schalte dein Lovense-Gerät ein.</text:p>
        </text:list-item>
        <text:list-item>
          <text:p text:style-name="P23">Öffne die <text:a xlink:type="simple" xlink:href="https://www.lovense.com/connect?utm_source=chatgpt.com" text:style-name="Internet_20_link" text:visited-style-name="Visited_20_Internet_20_Link">Lovense Connect App</text:a> auf deinem Smartphone.</text:p>
        </text:list-item>
        <text:list-item>
          <text:p text:style-name="P23">Verbinde das Toy per Bluetooth mit der Lovense-App.</text:p>
        </text:list-item>
        <text:list-item>
          <text:p text:style-name="P23">Lass die Lovense Connect App während der gesamten Video-Session im Hintergrund geöffnet.</text:p>
        </text:list-item>
        <text:list-item>
          <text:p text:style-name="P23"><text:soft-page-break/>Sobald die Verbindung aktiv ist, können die Fernsteuerungs- und Impulsfunktionen in der Videochat-App genutzt werden.</text:p>
        </text:list-item>
      </text:list>
      <text:p text:style-name="P24"/>
      <text:h text:style-name="P12" text:outline-level="1"/>
      <text:h text:style-name="P25" text:outline-level="1">Fernsteuerung / Impulsfunktion</text:h>
      <text:p text:style-name="Text_20_body">Im rechten Bereich kann der Teilnehmer Signale an den Host senden.</text:p>
      <text:p text:style-name="Text_20_body">Möglichkeiten:</text:p>
      <text:list text:style-name="L15">
        <text:list-item>
          <text:p text:style-name="P26">Intensität einstellen</text:p>
        </text:list-item>
        <text:list-item>
          <text:p text:style-name="P26">verschiedene Stufen:</text:p>
          <text:list>
            <text:list-item>
              <text:p text:style-name="P26">Leicht</text:p>
            </text:list-item>
            <text:list-item>
              <text:p text:style-name="P26">Mittel</text:p>
            </text:list-item>
            <text:list-item>
              <text:p text:style-name="P26">Stark</text:p>
            </text:list-item>
            <text:list-item>
              <text:p text:style-name="P26">Max</text:p>
            </text:list-item>
          </text:list>
        </text:list-item>
        <text:list-item>
          <text:p text:style-name="P26">Impuls senden</text:p>
        </text:list-item>
      </text:list>
      <text:p text:style-name="P8"/>
      <text:h text:style-name="P12" text:outline-level="1">8. Verbindung trennen</text:h>
      <text:p text:style-name="Text_20_body">Zum Beenden:</text:p>
      <text:list text:style-name="L16">
        <text:list-item>
          <text:p text:style-name="P27">auf <text:span text:style-name="Strong_20_Emphasis">„Trennen“</text:span> klicken</text:p>
        </text:list-item>
        <text:list-item>
          <text:p text:style-name="P27">Browserfenster schließen</text:p>
        </text:list-item>
      </text:list>
      <text:p text:style-name="P8"/>
      <text:h text:style-name="P12" text:outline-level="1">9. Fehlerbehebung</text:h>
      <text:h text:style-name="P9" text:outline-level="2">Keine Kamera sichtbar</text:h>
      <text:list text:style-name="L17">
        <text:list-item>
          <text:p text:style-name="P28">Browserberechtigung prüfen</text:p>
        </text:list-item>
        <text:list-item>
          <text:p text:style-name="P28">Seite neu laden</text:p>
        </text:list-item>
      </text:list>
      <text:h text:style-name="P9" text:outline-level="2">Kein Ton</text:h>
      <text:list text:style-name="L18">
        <text:list-item>
          <text:p text:style-name="P29">Mikrofon aktivieren</text:p>
        </text:list-item>
        <text:list-item>
          <text:p text:style-name="P29">Audioausgabe prüfen</text:p>
        </text:list-item>
      </text:list>
      <text:h text:style-name="P9" text:outline-level="2"><text:soft-page-break/>Verbindung klappt nicht</text:h>
      <text:list text:style-name="L19">
        <text:list-item>
          <text:p text:style-name="P30">richtige Peer-ID verwenden</text:p>
        </text:list-item>
        <text:list-item>
          <text:p text:style-name="P30">beide Teilnehmer online</text:p>
        </text:list-item>
        <text:list-item>
          <text:p text:style-name="P30">Firewall/VPN testweise deaktivieren</text:p>
        </text:list-item>
      </text:list>
      <text:p text:style-name="P8"/>
      <text:h text:style-name="P12" text:outline-level="1">10. Sicherheitshinweis</text:h>
      <text:p text:style-name="Text_20_body">Die Anwendung ist ausschließlich für private und einvernehmliche Nutzung vorgesehen.</text:p>
      <text:p text:style-name="Text_20_body"/>
      <text:p text:style-name="Standard"/>
      <text:p text:style-name="Standard"/>
      <text:p text:style-name="P31">English version:</text:p>
      <text:p text:style-name="P31"/>
      <text:h text:style-name="P32" text:outline-level="1">Invitation Email</text:h>
      <text:p text:style-name="P33"><text:span text:style-name="Strong_20_Emphasis">Subject:</text:span> Invitation to a Private Video Chat</text:p>
      <text:p text:style-name="P33">Hello,</text:p>
      <text:p text:style-name="P33">you are invited to a private one-to-one video chat session.</text:p>
      <text:h text:style-name="P34" text:outline-level="3">Access Information</text:h>
      <text:p text:style-name="P33"><text:span text:style-name="Strong_20_Emphasis">Login Page:</text:span><text:line-break/><text:a xlink:type="simple" xlink:href="https://svenmagnus.github.io/website_02/?utm_source=chatgpt.com" text:style-name="Internet_20_link" text:visited-style-name="Visited_20_Internet_20_Link">Videochat Login</text:a></text:p>
      <text:p text:style-name="P33"><text:span text:style-name="Strong_20_Emphasis">Password:</text:span><text:line-break/><text:span text:style-name="Source_20_Text">[INSERT PASSWORD HERE]</text:span></text:p>
      <text:p text:style-name="P33"><text:span text:style-name="Strong_20_Emphasis">Host Peer ID:</text:span><text:line-break/><text:span text:style-name="Source_20_Text">[INSERT PEER-ID HERE]</text:span></text:p>
      <text:p text:style-name="P35"/>
      <text:h text:style-name="P36" text:outline-level="2">How to Connect</text:h>
      <text:list text:style-name="L20">
        <text:list-item>
          <text:p text:style-name="P37">Open the video chat link.</text:p>
        </text:list-item>
        <text:list-item>
          <text:p text:style-name="P37">Allow camera and microphone access in your browser.</text:p>
        </text:list-item>
        <text:list-item>
          <text:p text:style-name="P37">Enter the password.</text:p>
        </text:list-item>
        <text:list-item>
          <text:p text:style-name="P37">Click:<text:line-break/><text:span text:style-name="Strong_20_Emphasis">“Connect to Host”</text:span></text:p>
        </text:list-item>
        <text:list-item>
          <text:p text:style-name="P37">Paste the host’s Peer ID into the field:<text:line-break/><text:span text:style-name="Strong_20_Emphasis">“Insert Host ID …”</text:span></text:p>
        </text:list-item>
        <text:list-item>
          <text:p text:style-name="P37"><text:soft-page-break/>The connection should be established within a few seconds.</text:p>
        </text:list-item>
      </text:list>
      <text:p text:style-name="P35"/>
      <text:h text:style-name="P36" text:outline-level="2">Notes</text:h>
      <text:list text:style-name="L21">
        <text:list-item>
          <text:p text:style-name="P38">Best used with:</text:p>
          <text:list>
            <text:list-item>
              <text:p text:style-name="P38"><text:a xlink:type="simple" xlink:href="https://www.google.com/chrome/?utm_source=chatgpt.com" text:style-name="Internet_20_link" text:visited-style-name="Visited_20_Internet_20_Link">Google Chrome</text:a></text:p>
            </text:list-item>
            <text:list-item>
              <text:p text:style-name="P38"><text:a xlink:type="simple" xlink:href="https://www.microsoft.com/edge?utm_source=chatgpt.com" text:style-name="Internet_20_link" text:visited-style-name="Visited_20_Internet_20_Link">Microsoft Edge</text:a></text:p>
            </text:list-item>
          </text:list>
        </text:list-item>
        <text:list-item>
          <text:p text:style-name="P38">Please use a stable internet connection.</text:p>
        </text:list-item>
        <text:list-item>
          <text:p text:style-name="P38">Camera and microphone permissions must be enabled.</text:p>
        </text:list-item>
      </text:list>
      <text:p text:style-name="P33">Best regards</text:p>
      <text:h text:style-name="P39" text:outline-level="1">User Manual – One-to-One Video Chat App</text:h>
      <text:h text:style-name="P36" text:outline-level="2">1. Purpose of the Application</text:h>
      <text:p text:style-name="P33">This application allows a direct private peer-to-peer video chat between two people.</text:p>
      <text:p text:style-name="P33">There are two roles:</text:p>
      <text:list text:style-name="L22">
        <text:list-item>
          <text:p text:style-name="P40"><text:span text:style-name="Strong_20_Emphasis">Host</text:span></text:p>
        </text:list-item>
        <text:list-item>
          <text:p text:style-name="P40"><text:span text:style-name="Strong_20_Emphasis">Guest / Participant</text:span></text:p>
        </text:list-item>
      </text:list>
      <text:p text:style-name="P33">The host creates the session.<text:line-break/>The participant connects using the host’s Peer ID.</text:p>
      <text:p text:style-name="P35"/>
      <text:h text:style-name="P39" text:outline-level="1">2. Requirements</text:h>
      <text:p text:style-name="P33">Recommended browsers:</text:p>
      <text:list text:style-name="L23">
        <text:list-item>
          <text:p text:style-name="P41"><text:a xlink:type="simple" xlink:href="https://www.google.com/chrome/?utm_source=chatgpt.com" text:style-name="Internet_20_link" text:visited-style-name="Visited_20_Internet_20_Link">Google Chrome</text:a></text:p>
        </text:list-item>
        <text:list-item>
          <text:p text:style-name="P41"><text:a xlink:type="simple" xlink:href="https://www.microsoft.com/edge?utm_source=chatgpt.com" text:style-name="Internet_20_link" text:visited-style-name="Visited_20_Internet_20_Link">Microsoft Edge</text:a></text:p>
        </text:list-item>
      </text:list>
      <text:p text:style-name="P33">Required:</text:p>
      <text:list text:style-name="L24">
        <text:list-item>
          <text:p text:style-name="P42">Camera</text:p>
        </text:list-item>
        <text:list-item>
          <text:p text:style-name="P42">Microphone</text:p>
        </text:list-item>
        <text:list-item>
          <text:p text:style-name="P42">Stable internet connection</text:p>
        </text:list-item>
      </text:list>
      <text:p text:style-name="P35"/>
      <text:h text:style-name="P39" text:outline-level="1"><text:soft-page-break/>3. App Interface</text:h>
      <text:p text:style-name="P33">The interface contains several sections:</text:p>
      <text:h text:style-name="P36" text:outline-level="2">Local Camera View (“YOU”)</text:h>
      <text:p text:style-name="P33">Displays your own camera feed.</text:p>
      <text:h text:style-name="P36" text:outline-level="2">Remote View (“REMOTE”)</text:h>
      <text:p text:style-name="P33">Displays the connected participant.</text:p>
      <text:h text:style-name="P36" text:outline-level="2">Connection Area</text:h>
      <text:p text:style-name="P33">This section is used to establish the connection:</text:p>
      <text:list text:style-name="L25">
        <text:list-item>
          <text:p text:style-name="P43">Start as Host</text:p>
        </text:list-item>
        <text:list-item>
          <text:p text:style-name="P43">Connect to Host</text:p>
        </text:list-item>
        <text:list-item>
          <text:p text:style-name="P43">Disconnect</text:p>
        </text:list-item>
      </text:list>
      <text:h text:style-name="P36" text:outline-level="2">Peer ID</text:h>
      <text:p text:style-name="P33">Each host automatically receives a unique Peer ID.</text:p>
      <text:p text:style-name="P33">This ID must be shared with the participant.</text:p>
      <text:p text:style-name="P35"/>
      <text:h text:style-name="P39" text:outline-level="1">4. Starting a Session as Host</text:h>
      <text:h text:style-name="P36" text:outline-level="2">Step-by-Step</text:h>
      <text:list text:style-name="L26">
        <text:list-item>
          <text:p text:style-name="P44">Open the app:<text:line-break/><text:a xlink:type="simple" xlink:href="https://svenmagnus.github.io/website_02/?utm_source=chatgpt.com" text:style-name="Internet_20_link" text:visited-style-name="Visited_20_Internet_20_Link">Videochat App</text:a></text:p>
        </text:list-item>
        <text:list-item>
          <text:p text:style-name="P44">Allow camera and microphone access.</text:p>
        </text:list-item>
        <text:list-item>
          <text:p text:style-name="P44">Click:<text:line-break/><text:span text:style-name="Strong_20_Emphasis">“Start as Host”</text:span></text:p>
        </text:list-item>
        <text:list-item>
          <text:p text:style-name="P44">Your current Peer ID will appear at the bottom.</text:p>
        </text:list-item>
        <text:list-item>
          <text:p text:style-name="P44">Send this Peer ID to the participant.</text:p>
        </text:list-item>
        <text:list-item>
          <text:p text:style-name="P44">Wait for the incoming connection.</text:p>
        </text:list-item>
      </text:list>
      <text:p text:style-name="P35"/>
      <text:h text:style-name="P39" text:outline-level="1"><text:soft-page-break/>5. Joining as Participant</text:h>
      <text:list text:style-name="L27">
        <text:list-item>
          <text:p text:style-name="P45">Open the invitation link.</text:p>
        </text:list-item>
        <text:list-item>
          <text:p text:style-name="P45">Allow camera and microphone access.</text:p>
        </text:list-item>
        <text:list-item>
          <text:p text:style-name="P45">Click:<text:line-break/><text:span text:style-name="Strong_20_Emphasis">“Connect to Host”</text:span></text:p>
        </text:list-item>
        <text:list-item>
          <text:p text:style-name="P45">Paste the host’s Peer ID into the input field.</text:p>
        </text:list-item>
        <text:list-item>
          <text:p text:style-name="P45">The connection will be established automatically.</text:p>
        </text:list-item>
      </text:list>
      <text:p text:style-name="P35"/>
      <text:h text:style-name="P39" text:outline-level="1">6. View Modes</text:h>
      <text:p text:style-name="P33">The app supports different layouts:</text:p>
      <text:list text:style-name="L28">
        <text:list-item>
          <text:p text:style-name="P46">Side-by-side</text:p>
        </text:list-item>
        <text:list-item>
          <text:p text:style-name="P46">PiP Remote Large</text:p>
        </text:list-item>
        <text:list-item>
          <text:p text:style-name="P46">PiP You Large</text:p>
        </text:list-item>
      </text:list>
      <text:p text:style-name="P33">You can also choose the Picture-in-Picture position:</text:p>
      <text:list text:style-name="L29">
        <text:list-item>
          <text:p text:style-name="P47">Bottom right</text:p>
        </text:list-item>
        <text:list-item>
          <text:p text:style-name="P47">Other positions depending on settings</text:p>
        </text:list-item>
      </text:list>
      <text:p text:style-name="P35"/>
      <text:h text:style-name="P48" text:outline-level="2"><text:span text:style-name="T2">7. </text:span>Lovense toy integration </text:h>
      <text:h text:style-name="P49" text:outline-level="3">Connect Your Lovense Toy</text:h>
      <text:p text:style-name="P33">Before starting the session:</text:p>
      <text:list text:style-name="L30">
        <text:list-item>
          <text:p text:style-name="P50">Turn on your Lovense device. </text:p>
        </text:list-item>
        <text:list-item>
          <text:p text:style-name="P50">Open the Lovense Connect App on your smartphone. </text:p>
        </text:list-item>
        <text:list-item>
          <text:p text:style-name="P50">Make sure the toy is connected to the Lovense app via Bluetooth. </text:p>
        </text:list-item>
        <text:list-item>
          <text:p text:style-name="P50">Keep the Lovense Connect app running in the background during the video session. </text:p>
        </text:list-item>
        <text:list-item>
          <text:p text:style-name="P51">Once connected, the remote control / impulse features in the video chat app can be used.</text:p>
        </text:list-item>
      </text:list>
      <text:h text:style-name="P52" text:outline-level="1">Remote Control / Impulse Function</text:h>
      <text:p text:style-name="P33">On the right side, participants can send signals to the host.</text:p>
      <text:p text:style-name="P33">Available options:</text:p>
      <text:list text:style-name="L31">
        <text:list-item>
          <text:p text:style-name="P53">Adjust intensity</text:p>
        </text:list-item>
        <text:list-item>
          <text:p text:style-name="P53">Different levels:</text:p>
          <text:list>
            <text:list-item>
              <text:p text:style-name="P53"><text:soft-page-break/>Light</text:p>
            </text:list-item>
            <text:list-item>
              <text:p text:style-name="P53">Medium</text:p>
            </text:list-item>
            <text:list-item>
              <text:p text:style-name="P53">Strong</text:p>
            </text:list-item>
            <text:list-item>
              <text:p text:style-name="P53">Max</text:p>
            </text:list-item>
          </text:list>
        </text:list-item>
        <text:list-item>
          <text:p text:style-name="P53">Send impulse</text:p>
        </text:list-item>
      </text:list>
      <text:p text:style-name="P35"/>
      <text:h text:style-name="P39" text:outline-level="1">8. Ending the Session</text:h>
      <text:p text:style-name="P33">To end the session:</text:p>
      <text:list text:style-name="L32">
        <text:list-item>
          <text:p text:style-name="P54">Click <text:span text:style-name="Strong_20_Emphasis">“Disconnect”</text:span></text:p>
        </text:list-item>
        <text:list-item>
          <text:p text:style-name="P54">Or close the browser window</text:p>
        </text:list-item>
      </text:list>
      <text:p text:style-name="P35"/>
      <text:h text:style-name="P39" text:outline-level="1">9. Troubleshooting</text:h>
      <text:h text:style-name="P36" text:outline-level="2">Camera not visible</text:h>
      <text:list text:style-name="L33">
        <text:list-item>
          <text:p text:style-name="P55">Check browser permissions</text:p>
        </text:list-item>
        <text:list-item>
          <text:p text:style-name="P55">Reload the page</text:p>
        </text:list-item>
      </text:list>
      <text:h text:style-name="P36" text:outline-level="2">No audio</text:h>
      <text:list text:style-name="L34">
        <text:list-item>
          <text:p text:style-name="P56">Enable microphone access</text:p>
        </text:list-item>
        <text:list-item>
          <text:p text:style-name="P56">Check audio output settings</text:p>
        </text:list-item>
      </text:list>
      <text:h text:style-name="P36" text:outline-level="2">Connection fails</text:h>
      <text:list text:style-name="L35">
        <text:list-item>
          <text:p text:style-name="P57">Verify the correct Peer ID</text:p>
        </text:list-item>
        <text:list-item>
          <text:p text:style-name="P57">Ensure both users are online</text:p>
        </text:list-item>
        <text:list-item>
          <text:p text:style-name="P57">Temporarily disable VPN or firewall if needed</text:p>
        </text:list-item>
      </text:list>
      <text:p text:style-name="P35"/>
      <text:h text:style-name="P39" text:outline-level="1">10. Safety Notice</text:h>
      <text:p text:style-name="P33">This application is intended exclusively for private and consensual use.</text:p>
      <text:p text:style-name="P31"/>
      <text:p text:style-name="P31"/>
      <text:p text:style-name="P31"><text:soft-page-break/></text:p>
      <text:p text:style-name="P31">--------</text:p>
      <text:p text:style-name="P31"/>
      <text:p text:style-name="P31"/>
      <text:p text:style-name="P31"/>
      <text:p text:style-name="P58">Lovense bietet für den PC zwei verschiedene Wege an. Es ist also <text:span text:style-name="T3">nicht zwingend ein Handy erforderlich</text:span>, aber die Art und Weise, wie die Verbindung technisch hergestellt wird, unterscheidet sich je nach Zielsetzung.</text:p>
      <text:section text:style-name="Sect1" text:name="model-response-message-contentr_479e6f70dd95e505">
        <text:p text:style-name="P59">Hier sind die Möglichkeiten für deinen PC-Setup:</text:p>
        <text:h text:style-name="P60" text:outline-level="3">1. Lovense Connect (PC/Mac App) — Der "Brücken"-Modus</text:h>
        <text:p text:style-name="P59">Das ist die gängigste Methode für den Desktop.</text:p>
        <text:list text:style-name="L36">
          <text:list-item>
            <text:p text:style-name="P61"><text:span text:style-name="T3">Wie es funktioniert:</text:span> Du installierst die <text:span text:style-name="T3">Lovense Connect App</text:span> auf deinem Computer.</text:p>
          </text:list-item>
          <text:list-item>
            <text:p text:style-name="P61"><text:span text:style-name="T3">Hardware:</text:span> Du benötigst den <text:span text:style-name="T3">Lovense USB Bluetooth Adapter</text:span> (Dongle). Die herkömmliche Bluetooth-Funktion von Windows-Laptops ist oft zu instabil oder inkompatibel mit den Toys; der spezielle Dongle umgeht dieses Problem.</text:p>
          </text:list-item>
          <text:list-item>
            <text:p text:style-name="P61"><text:span text:style-name="T3">Vorteil:</text:span> Das Handy bleibt komplett außen vor. Die App auf dem PC fungiert als lokaler Server, der die Signale von Webseiten (wie deiner Dual-Peer-App) empfängt und an das Toy weiterleitet.</text:p>
          </text:list-item>
        </text:list>
        <text:h text:style-name="P60" text:outline-level="3">2. Browser-Direktverbindung (Web Bluetooth)</text:h>
        <text:p text:style-name="P62">Einige moderne Browser (vor allem Chrome und Edge auf Windows/Android) unterstützen <text:span text:style-name="T3">Web Bluetooth</text:span>.</text:p>
        <text:list text:style-name="L37">
          <text:list-item>
            <text:p text:style-name="P63"><text:span text:style-name="T3">Wie es funktioniert:</text:span> Eine Webseite kann direkt über den Browser nach Bluetooth-Geräten suchen.</text:p>
          </text:list-item>
          <text:list-item>
            <text:p text:style-name="P64"><text:span text:style-name="T4">Einschränkung:</text:span><text:span text:style-name="T5"> In deinem aktuellen Code nutzt du das </text:span><text:span text:style-name="Source_20_Text"><text:span text:style-name="T6">broadcast.js</text:span></text:span><text:span text:style-name="T5"> SDK der Lovense Cam Extension. Dieses SDK ist primär darauf ausgelegt, mit der installierten Lovense Software (Connect oder Browser-Extension) zu kommunizieren, anstatt das Bluetooth-Protokoll selbst zu steuern.</text:span></text:p>
          </text:list-item>
        </text:list>
        <text:h text:style-name="P60" text:outline-level="3">3. Die Lovense Browser Extension</text:h>
        <text:p text:style-name="P62">Zusätzlich zur Connect-App gibt es eine <text:span text:style-name="T3">Chrome/Edge Extension</text:span>.</text:p>
        <text:list text:style-name="L38">
          <text:list-item>
            <text:p text:style-name="P65">Diese dient oft als Bindeglied zwischen einer Webseite und der Lovense Connect Software (egal ob diese auf dem Handy oder dem PC läuft).</text:p>
          </text:list-item>
          <text:list-item>
            <text:p text:style-name="P66"><text:span text:style-name="T5">In deinem Code-Snippet (</text:span><text:span text:style-name="Source_20_Text"><text:span text:style-name="T6">window.LOVENSE_SITE_NAME</text:span></text:span><text:span text:style-name="T5">) wird genau diese Schnittstelle angesprochen.</text:span></text:p>
          </text:list-item>
        </text:list>
        <text:p text:style-name="P35"/>
        <text:h text:style-name="P60" text:outline-level="3">Was bedeutet das für dein Projekt?</text:h>
        <text:p text:style-name="P67"><text:span text:style-name="T5">Da du das </text:span><text:span text:style-name="Source_20_Text"><text:span text:style-name="T6">cam-extension/static/js-sdk/broadcast.js</text:span></text:span><text:span text:style-name="T5"> eingebunden hast, sieht der Workflow am PC normalerweise so aus:</text:span></text:p>
        <text:list text:style-name="L39">
          <text:list-item>
            <text:p text:style-name="P68"><text:span text:style-name="T3">Software:</text:span> Der User hat <text:span text:style-name="T3">Lovense Connect</text:span> auf dem PC gestartet (mit USB-Dongle).</text:p>
          </text:list-item>
          <text:list-item>
            <text:p text:style-name="P68"><text:span text:style-name="T3">Erkennung:</text:span> Die Software registriert das Toy.</text:p>
          </text:list-item>
          <text:list-item>
            <text:p text:style-name="P68"><text:span text:style-name="T3">Schnittstelle:</text:span> Dein JavaScript-Code sendet einen "Befehl" (z. B. einen simulierten Tip) an die lokale Schnittstelle.</text:p>
          </text:list-item>
          <text:list-item>
            <text:p text:style-name="P68"><text:span text:style-name="T3">Aktion:</text:span> Die Lovense-Software empfängt dies und lässt das Toy vibrieren.</text:p>
          </text:list-item>
        </text:list>
        <text:p text:style-name="P62"><text:soft-page-break/><text:span text:style-name="T3">Zusammenfassend:</text:span> Ja, es geht über den PC, aber für eine stabile Verbindung ohne Handy ist bei Lovense am Desktop fast immer der <text:span text:style-name="T3">spezielle USB-Bluetooth-Adapter</text:span> erforderlich, da die Standard-Bluetooth-Stacks von Windows die Toys oft nicht korrekt ansprechen können.</text:p>
        <text:h text:style-name="P60" text:outline-level="3">Kleiner Tipp für deinen Code:</text:h>
        <text:p text:style-name="P67"><text:span text:style-name="T5">Falls du testen willst, ob die Verbindung zum lokalen PC-Server steht, bietet Lovense oft eine lokale API-Antwort unter </text:span><text:span text:style-name="Source_20_Text"><text:span text:style-name="T6">[http://127.0.0.1:20010/status](http://127.0.0.1:20010/status)</text:span></text:span><text:span text:style-name="T5">. Wenn diese Adresse im Browser des Nutzers erreichbar ist, ist die PC-Software (Lovense Connect) aktiv und bereit.</text:span></text:p>
      </text:section>
      <text:p text:style-name="P31"/>
      <text:p text:style-name="P31"/>
      <text:p text:style-name="P31"/>
      <text:p text:style-name="P31"/>
      <text:p text:style-name="P31"/>
      <text:p text:style-name="P31">----</text:p>
      <text:p text:style-name="P31"/>
      <text:p text:style-name="P31"/>
      <text:p text:style-name="P69">OBS</text:p>
      <text:p text:style-name="P69"/>
      <text:p text:style-name="P69"/>
      <text:h text:style-name="P70" text:outline-level="2">Für das Manual des Hosts (Der Streamer mit OBS)</text:h>
      <text:p text:style-name="P71"><text:span text:style-name="T7">Der Host nutzt den </text:span><text:span text:style-name="T8">WHIP Ingest</text:span><text:span text:style-name="T7">-Pfad. In deinem Terminal steht: </text:span><text:span text:style-name="Source_20_Text"><text:span text:style-name="T7">http://localhost:8787/whip/:stream_key</text:span></text:span><text:span text:style-name="T7">. Das bedeutet für das Handbuch:</text:span></text:p>
      <text:list text:style-name="L40">
        <text:list-item>
          <text:p text:style-name="P72"><text:span text:style-name="T8">Der Server-Pfad:</text:span><text:span text:style-name="T7"> Sobald das System online ist, lautet die URL für OBS: </text:span><text:span text:style-name="Source_20_Text"><text:span text:style-name="T7">https://whip.tangent-club.com/whip/</text:span></text:span></text:p>
        </text:list-item>
        <text:list-item>
          <text:p text:style-name="P72"><text:span text:style-name="T8">Der Streaming-Schlüssel:</text:span><text:span text:style-name="T7"> Das </text:span><text:span text:style-name="Source_20_Text"><text:span text:style-name="T7">:stream_key</text:span></text:span><text:span text:style-name="T7"> am Ende ist der Platzhalter. In OBS trägt der Streamer die URL ein und gibt im Feld „Inhaber-Token“ (oder Stream Key) seinen persönlichen, professionellen Schlüssel (z. B. </text:span><text:span text:style-name="Source_20_Text"><text:span text:style-name="T7">live_tangent_771x92</text:span></text:span><text:span text:style-name="T7">) ein. OBS setzt das beim Senden automatisch richtig zusammen.</text:span></text:p>
        </text:list-item>
      </text:list>
      <text:h text:style-name="P73" text:outline-level="2">2. Für das Manual des Gastes (Der Zuschauer / Partner)</text:h>
      <text:p text:style-name="P71"><text:span text:style-name="T7">Hier wird es für dein P2P-Netzwerk interessant! Der Pfad </text:span><text:span text:style-name="Source_20_Text"><text:span text:style-name="T7">WHEP playback: ...</text:span></text:span><text:span text:style-name="T7"> zeigt, dass der Server das Video nicht nur empfangen, sondern auch per WebRTC wieder ausgeben kann.</text:span></text:p>
      <text:p text:style-name="P74">Da du aber ein <text:span text:style-name="T9">Peer-to-Peer-Netzwerk</text:span> (z. B. via PeerJS) betreibst, läuft das für die Gäste normalerweise so ab:</text:p>
      <text:list text:style-name="L41">
        <text:list-item>
          <text:p text:style-name="P75"><text:span text:style-name="T9">Der Host verbindet sich mit OBS</text:span> $\rightarrow$ das Signal landet auf deinem WHIP-Server.</text:p>
        </text:list-item>
        <text:list-item>
          <text:p text:style-name="P75"><text:span text:style-name="T9">Der Host öffnet deine Web-App</text:span> als „Host“ $\rightarrow$ seine Web-App holt sich das Video vom lokalen Server ab und wird zum <text:span text:style-name="T10">primären Peer</text:span>.</text:p>
        </text:list-item>
        <text:list-item>
          <text:p text:style-name="P75"><text:span text:style-name="T9">Der Gast</text:span> muss von diesem ganzen Server-Kram überhaupt nichts wissen! Er bekommt wie bisher einfach die <text:span text:style-name="T9">Peer-ID</text:span> des Hosts (oder klickt auf einen <text:soft-page-break/>Einladungslink). Der Gast verbindet sich direkt von Browser zu Browser (P2P) mit dem Host und zieht sich das Bild direkt von dessen Rechner, ohne den Server zu belasten.</text:p>
        </text:list-item>
      </text:list>
      <text:h text:style-name="P76" text:outline-level="3">Kurztipp fürs Handbuch:</text:h>
      <text:p text:style-name="P77">Anleitung für Streamer (OBS-Setup):</text:p>
      <text:list text:style-name="L42">
        <text:list-item>
          <text:p text:style-name="P78">Öffne OBS Studio und erstelle ein neues Profil (z. B. "Tangent-Club").</text:p>
        </text:list-item>
        <text:list-item>
          <text:p text:style-name="P78">Gehe zu <text:span text:style-name="T10">Einstellungen $\rightarrow$ Stream</text:span> und wähle bei Plattform <text:span text:style-name="T9">WHIP</text:span>.</text:p>
        </text:list-item>
        <text:list-item>
          <text:p text:style-name="P79"><text:span text:style-name="T7">Trage bei Server </text:span><text:span text:style-name="Source_20_Text"><text:span text:style-name="T7">https://whip.tangent-club.com/whip/</text:span></text:span><text:span text:style-name="T7"> ein.</text:span></text:p>
        </text:list-item>
        <text:list-item>
          <text:p text:style-name="P78">Trage bei Inhaber-Token deinen persönlichen Streaming-Schlüssel ein.</text:p>
        </text:list-item>
        <text:list-item>
          <text:p text:style-name="P78">Klicke auf <text:span text:style-name="T10">Stream starten</text:span> und starte danach die Übertragung in der Web-App.</text:p>
        </text:list-item>
      </text:list>
      <text:p text:style-name="P74">Jetzt steht deinem ersten Live-Test auf dem Rechner nichts mehr im Weg. Klick mal in OBS auf „<text:span text:style-name="T9">Stream starten“</text:span> – dann müsste der Server im Terminal anfangen, die Verbindung zu loggen!</text:p>
      <text:p text:style-name="P69"/>
      <text:p text:style-name="P69"/>
      <text:h text:style-name="P80" text:outline-level="3">1. Einmalige OBS-Fehlermeldungen ignorieren</text:h>
      <text:list text:style-name="L43">
        <text:list-item>
          <text:p text:style-name="P81"><text:span text:style-name="T9">Der Opus-Hinweis:</text:span> Beim ersten Umstellen auf WHIP meldet OBS, dass der Audio-Kodierer auf „Opus“ geändert wird. Hier einfach dauerhaft auf „<text:span text:style-name="T9">Ja“</text:span> klicken.</text:p>
        </text:list-item>
        <text:list-item>
          <text:p text:style-name="P82"><text:span text:style-name="T8">Der Aufnahmeformat-Fehler:</text:span><text:span text:style-name="T7"> Wenn OBS das Starten verweigert, weil kein kompatibles Aufnahmeformat gesetzt ist: In OBS unter </text:span><text:span text:style-name="T11">Einstellungen $\rightarrow$ Ausgabe $\rightarrow$ Aufnahme</text:span><text:span text:style-name="T7"> das Format auf </text:span><text:span text:style-name="Source_20_Text"><text:span text:style-name="T8">mp4</text:span></text:span><text:span text:style-name="T7"> oder </text:span><text:span text:style-name="Source_20_Text"><text:span text:style-name="T8">mkv</text:span></text:span><text:span text:style-name="T7"> umstellen.</text:span></text:p>
        </text:list-item>
      </text:list>
      <text:h text:style-name="P76" text:outline-level="3">2. Strikt an die Reihenfolge halten</text:h>
      <text:p text:style-name="P74">Der Server akzeptiert den Stream nur, wenn er vorher angemeldet wurde.</text:p>
      <text:list text:style-name="L44">
        <text:list-item>
          <text:p text:style-name="P83"><text:span text:style-name="T8">Zuerst</text:span><text:span text:style-name="T7"> auf der Webseite die Quelle auf </text:span><text:span text:style-name="Source_20_Text"><text:span text:style-name="T7">OBS Studio (WHIP)</text:span></text:span><text:span text:style-name="T7"> stellen und „</text:span><text:span text:style-name="T8">Start as Host“</text:span><text:span text:style-name="T7"> klicken.</text:span></text:p>
        </text:list-item>
        <text:list-item>
          <text:p text:style-name="P84"><text:span text:style-name="T9">Danach</text:span> erst in OBS auf „<text:span text:style-name="T9">Stream starten“</text:span> klicken.</text:p>
        </text:list-item>
      </text:list>
      <text:h text:style-name="P76" text:outline-level="3">3. Port-Blockade lösen (Falls der Server nicht startet)</text:h>
      <text:p text:style-name="P71"><text:span text:style-name="T7">Falls der Node.js-Server im Terminal mit </text:span><text:span text:style-name="Source_20_Text"><text:span text:style-name="T7">EADDRINUSE</text:span></text:span><text:span text:style-name="T7"> abbricht, läuft noch ein alter Prozess im Hintergrund. Befehl zum Freimachen:</text:span></text:p>
      <text:p text:style-name="P74"/>
      <text:p text:style-name="P74">kill -9 $(lsof -t -i:8787)</text:p>
      <text:p text:style-name="P69"><text:soft-page-break/></text:p>
      <text:p text:style-name="P69"/>
      <text:p text:style-name="P69"/>
      <text:p text:style-name="P69">----</text:p>
      <text:p text:style-name="P69"/>
      <text:p text:style-name="P69"/>
      <text:p text:style-name="P69"/>
      <text:p text:style-name="P69">2. Neuen Stream-Key erzeugen Auf deiner Webseite: Broadcast → OBS Studio (WHIP) → Start as Host oder per API: curl -X POST http://localhost:8787/api/broadcast/register</text:p>
      <text:p text:style-name="P85">Die Schritte bedeuten:</text:p>
      <text:h text:style-name="P86" text:outline-level="3">Über die Webseite</text:h>
      <text:list text:style-name="L45">
        <text:list-item>
          <text:p text:style-name="P87">Öffne deine Broadcast-Oberfläche. </text:p>
        </text:list-item>
        <text:list-item>
          <text:p text:style-name="P87">Gehe zu <text:span text:style-name="Strong_20_Emphasis">Broadcast → OBS Studio (WHIP)</text:span>. </text:p>
        </text:list-item>
        <text:list-item>
          <text:p text:style-name="P87">Klicke auf <text:span text:style-name="Strong_20_Emphasis">Start as Host</text:span>. </text:p>
        </text:list-item>
        <text:list-item>
          <text:p text:style-name="P88">Das System erzeugt einen neuen Stream bzw. einen neuen Stream-Key für die Verbindung mit OBS. </text:p>
        </text:list-item>
      </text:list>
      <text:h text:style-name="P86" text:outline-level="3">Per API</text:h>
      <text:p text:style-name="P85">Du kannst stattdessen einen neuen Stream auch per HTTP-Aufruf registrieren:</text:p>
      <text:section text:style-name="Sect1" text:name="code-block-viewer">
        <text:p text:style-name="P89"><text:span text:style-name="Source_20_Text">curl -X POST http://localhost:8787/api/broadcast/register</text:span></text:p>
      </text:section>
      <text:p text:style-name="P85">Wenn der Dienst läuft, erhältst du normalerweise eine JSON-Antwort mit Informationen wie Stream-ID, Stream-Key oder WHIP-Endpoint, beispielsweise:</text:p>
      <text:section text:style-name="Sect1" text:name="Section1">
        <text:p text:style-name="P90"><text:bookmark text:name="code-block-viewer"/><text:span text:style-name="Source_20_Text">{</text:span></text:p>
        <text:p text:style-name="P91"><text:span text:style-name="Source_20_Text"><text:s text:c="2"/>"id": "abc123",</text:span></text:p>
        <text:p text:style-name="P91"><text:span text:style-name="Source_20_Text"><text:s text:c="2"/>"streamKey": "xyz789",</text:span></text:p>
        <text:p text:style-name="P91"><text:span text:style-name="Source_20_Text"><text:s text:c="2"/>"whipUrl": "http://localhost:8787/whip/abc123"</text:span></text:p>
        <text:p text:style-name="P92"><text:span text:style-name="Source_20_Text">}</text:span></text:p>
      </text:section>
      <text:p text:style-name="P85">Die genaue Antwort hängt von der verwendeten Broadcast-Software bzw. dem Server ab.</text:p>
      <text:p text:style-name="P85">Wenn du mir verrätst, welches System du verwendest (z. B. Owncast, Mediasoup, LiveKit, Open Streaming Platform oder ein anderes Projekt), kann ich dir die exakte Vorgehensweise und die erwartete API-Antwort nennen.</text:p>
      <text:p text:style-name="P69"/>
      <text:p text:style-name="P69"/>
      <text:p text:style-name="Standard"/>
      <text:p text:style-name="Standard"/>
      <text:p text:style-name="Standard">Dein Server ist schon 90% korrekt.</text:p>
      <text:p text:style-name="Standard">Für echtes WHIP brauchst du nur:</text:p>
      <text:p text:style-name="Standard">✔ HTTP Endpoint</text:p>
      <text:p text:style-name="Standard">✔ SDP handling <text:s text:c="2"/><text:span text:style-name="Strong_20_Emphasis">Session Description Protocol</text:span> (ein Netzwerkprotokoll) oder Software-Defined Perimeter</text:p>
      <text:p text:style-name="Standard"/>
      <text:p text:style-name="Standard">✔ WebRTC PeerConnection</text:p>
      <text:p text:style-name="Standard">✔ ICE servers</text:p>
      <text:p text:style-name="Standard"/>
      <text:p text:style-name="Standard"/>
      <text:p text:style-name="Standard"><text:soft-page-break/></text:p>
      <text:p text:style-name="P93"><text:span text:style-name="T12">eigener </text:span>WebRTC WHIP/WHEP Server <text:s/><text:span text:style-name="T13">lokal oder dort:</text:span></text:p>
      <text:p text:style-name="P93"/>
      <text:p text:style-name="P94">perfekt zum testen mit OBS</text:p>
      <text:p text:style-name="P94"/>
      <text:h text:style-name="P95" text:outline-level="3">Gute Anbieter:</text:h>
      <text:list text:style-name="L46">
        <text:list-item>
          <text:p text:style-name="P96">Hetzner (Deutschland, sehr gut für Preis/Leistung) </text:p>
        </text:list-item>
        <text:list-item>
          <text:p text:style-name="P96">DigitalOcean </text:p>
        </text:list-item>
        <text:list-item>
          <text:p text:style-name="P96">Linode </text:p>
        </text:list-item>
        <text:list-item>
          <text:p text:style-name="P97">OVH</text:p>
        </text:list-item>
      </text:list>
      <text:p text:style-name="P94"/>
      <text:p text:style-name="P98">OBS WHIP funktioniert <text:span text:style-name="Strong_20_Emphasis">nicht zuverlässig nur mit HTTP im Internet</text:span></text:p>
      <text:p text:style-name="P99">Du brauchst:</text:p>
      <text:h text:style-name="P100" text:outline-level="3">👉 HTTPS (Pflicht für echte Nutzung)</text:h>
      <text:p text:style-name="P94"/>
      <text:p text:style-name="P94"/>
      <text:h text:style-name="P101" text:outline-level="1">Meine klare Empfehlung für dich</text:h>
      <text:h text:style-name="P102" text:outline-level="2">Wenn du lernen / bauen willst:</text:h>
      <text:p text:style-name="P99">👉 VPS + dein Node Server + HTTPS</text:p>
      <text:h text:style-name="P102" text:outline-level="2">Wenn du einfach streamen willst:</text:h>
      <text:p text:style-name="P99">👉 MediaMTX (10x einfacher)</text:p>
      <text:p text:style-name="P99"/>
      <text:p text:style-name="P99"/>
      <text:p text:style-name="P99">https://mediamtx.org/</text:p>
      <text:p text:style-name="P103"/>
      <text:p text:style-name="P103"/>
      <text:p text:style-name="P103"/>
      <text:p text:style-name="P103">Aber auch das</text:p>
      <text:p text:style-name="P94"/>
      <text:p text:style-name="P94"/>
      <text:p text:style-name="P94"><text:span text:style-name="T9">Das Verkaufsargument:</text:span> <text:span text:style-name="T9">Absolute Privatsphäre.</text:span> Da du mit PeerJS arbeitest, läuft der Datenstrom (Video/Audio) direkt von User zu User (P2P) und wird nicht über deine Server gestreamt. Das ist ein gigantischer Marketing-Vorteil für sicherheitsbewusste Nutzer: <text:span text:style-name="T10">"Was im Raum passiert, bleibt im Raum – keine Server-Speicherung."</text:span></text:p>
      <text:p text:style-name="P104"/>
      <text:p text:style-name="P104"/>
      <text:p text:style-name="P105"><text:soft-page-break/>Monetarisierung</text:p>
      <text:p text:style-name="P106"/>
      <text:p text:style-name="P106"/>
      <text:p text:style-name="P106"/>
      <text:p text:style-name="P106"/>
      <text:p text:style-name="P107">Eine Monetarisierung für eine spezialisierte Echtzeit-Anwendung wie diese ist absolut naheliegend und hochgradig spannend. Da du hier Hardware-Steuerung (Remote Control) und Peer-to-Peer-Streaming (PeerJS) kombinierst, bewegst du dich in einem lukrativen Nischenmarkt, in dem Nutzer sehr bereitwillig für Zuverlässigkeit, Privatsphäre und exklusive Features bezahlen.</text:p>
      <text:section text:style-name="Sect1" text:name="model-response-message-contentr_d0e4de606b9675f8">
        <text:p text:style-name="P108">Hier sind die vielversprechendsten Geschäftsmodelle und Ansätze, wie du das Ganze – passend zur Struktur deiner App – monetarisieren kannst:</text:p>
        <text:h text:style-name="P109" text:outline-level="2">1. Das Token- / Tipp-Modell (Cam- &amp; Creator-Modell)</text:h>
        <text:p text:style-name="P108">Da du in deiner UI bereits den Begriff "Specials need tokens in Stream Master" stehen hast, ist das der klassische und erfolgreichste Weg in diesem Bereich.</text:p>
        <text:list text:style-name="L47">
          <text:list-item>
            <text:p text:style-name="P110"><text:span text:style-name="T9">Wie es funktioniert:</text:span> Nutzer kaufen Token-Pakete direkt auf der Plattform. Während des Chats kann ein Gast dem Host Token senden, um bestimmte Aktionen freizuschalten.</text:p>
          </text:list-item>
          <text:list-item>
            <text:p text:style-name="P110"><text:span text:style-name="T9">Die technische Koppelung an dein Konzept:</text:span> Wenn der Partner im Profil "Spank ass" oder "High Vibration" freigeschaltet hat, kostet das Auslösen dieses Quick-Action-Buttons im Chat eine vom Host festgelegte Anzahl an Token.</text:p>
          </text:list-item>
          <text:list-item>
            <text:p text:style-name="P110"><text:span text:style-name="T9">Dein Anteil:</text:span> Du behältst als Plattformbetreiber eine prozentuale Vermittlungsgebühr (z. B. 15 % bis 30 %) von jedem eingelösten Token ein.</text:p>
          </text:list-item>
        </text:list>
        <text:h text:style-name="P109" text:outline-level="2">2. Das Freemium-Modell (Features hinter der Paywall)</text:h>
        <text:p text:style-name="P108">Du lässt die Basis-Verbindung kostenlos, beschränkst aber den Komfort oder die Intensität der Interaktion für Gratis-Nutzer.</text:p>
        <text:list text:style-name="L48">
          <text:list-item>
            <text:p text:style-name="P111"><text:span text:style-name="T9">Gratis-Version:</text:span> Standard-Videoauflösung, reine Text-Chats und grundlegende Remote-Control-Funktionen (z. B. nur niedrige Stufen oder manuelle Regler).</text:p>
          </text:list-item>
          <text:list-item>
            <text:p text:style-name="P112">Premium-Mitgliedschaft (Abo oder Einmalkauf):</text:p>
            <text:list>
              <text:list-item>
                <text:p text:style-name="P111"><text:span text:style-name="T9">HD/4K-Streaming:</text:span> Höhere Bandbreite für die Videoübertragung.</text:p>
              </text:list-item>
              <text:list-item>
                <text:p text:style-name="P111"><text:span text:style-name="T9">Die Profil-Aktionen:</text:span> Die von dir beschriebene Funktion, Vorlieben direkt per Button-Klick im Chat auszulösen, wird zum Premium-Feature.</text:p>
              </text:list-item>
              <text:list-item>
                <text:p text:style-name="P111"><text:span text:style-name="T9">Erweiterte Hardware-Muster:</text:span> Komplexe Vibrations- oder Bewegungsmuster (die "Specials"), die über die Standard-Schieberegler hinausgehen.</text:p>
              </text:list-item>
            </text:list>
          </text:list-item>
        </text:list>
        <text:h text:style-name="P109" text:outline-level="2">3. "Pay-per-Session" / Virtuelle Räume mieten</text:h>
        <text:p text:style-name="P108">Da es sich um einen direkten Camchat für zwei Personen handelt, kannst du die Anwendung als absolut privaten, sicheren "Raum" anbieten.</text:p>
        <text:list text:style-name="L49">
          <text:list-item>
            <text:p text:style-name="P113"><text:soft-page-break/><text:span text:style-name="T9">Das Prinzip:</text:span> Nutzer zahlen einen kleinen Betrag (oder Token pro Minute), um einen verschlüsselten, dedizierten Raum zu eröffnen.</text:p>
          </text:list-item>
          <text:list-item>
            <text:p text:style-name="P113"><text:span text:style-name="T9">Das Verkaufsargument:</text:span> <text:span text:style-name="T9">Absolute Privatsphäre.</text:span> Da du mit PeerJS arbeitest, läuft der Datenstrom (Video/Audio) direkt von User zu User (P2P) und wird nicht über deine Server gestreamt. Das ist ein gigantischer Marketing-Vorteil für sicherheitsbewusste Nutzer: "Was im Raum passiert, bleibt im Raum – keine Server-Speicherung."</text:p>
          </text:list-item>
        </text:list>
        <text:h text:style-name="P109" text:outline-level="2">4. White-Label-Lizenzierung (B2B)</text:h>
        <text:p text:style-name="P108">Statt die Plattform selbst mühsam an Endkunden zu vermarkten, verkaufst du die fertige Technologie an bestehende Unternehmen.</text:p>
        <text:list text:style-name="L50">
          <text:list-item>
            <text:p text:style-name="P114"><text:span text:style-name="T9">Wie es funktioniert:</text:span> Große, bereits etablierte Portale oder Hardware-Hersteller suchen oft nach stabilen, webbasierten Lösungen für ihre Creator. Du verkaufst dein System als "White Label" (die Software wird optisch an die Marke des Käufers angepasst).</text:p>
          </text:list-item>
          <text:list-item>
            <text:p text:style-name="P114"><text:span text:style-name="T9">Einnahmen:</text:span> Du verlangst eine hohe, einmalige Einrichtungsgebühr plus monatliche Lizenz- und Wartungsgebühren für die Bereitstellung der Peer-Infrastruktur.</text:p>
          </text:list-item>
        </text:list>
        <text:h text:style-name="P109" text:outline-level="2">Visuelle Integration in dein Design</text:h>
        <text:p text:style-name="P108">Wie bindet man das ein, ohne die cleane UI zu zerstören?</text:p>
        <text:list text:style-name="L51">
          <text:list-item>
            <text:p text:style-name="P115"><text:span text:style-name="T9">In der Profil-Ansicht (Settings):</text:span> Wenn ein User seine Vorlieben einstellt, gibt es direkt daneben ein Feld: "Token-Preis für diese Aktion festlegen".</text:p>
          </text:list-item>
          <text:list-item>
            <text:p text:style-name="P115"><text:span text:style-name="T9">Im Live-Chat / Remote Control:</text:span> Die Quick-Action-Buttons für die Vorlieben des Partners bekommen ein kleines Token-Symbol (z. B. eine kleine Münze) mit dem Preis spendiert (z. B. <text:span text:style-name="Source_20_Text">Spank ass [ 20 🪙 ]</text:span>). Ein Klick zieht die Token ab und triggert das Signal.</text:p>
          </text:list-item>
          <text:list-item>
            <text:p text:style-name="P115"><text:span text:style-name="T9">Guthaben-Anzeige:</text:span> Eine kleine, elegante Anzeige deines Token-Kontostands direkt in der Nähe des Profil-Icons oben rechts.</text:p>
          </text:list-item>
        </text:list>
        <text:p text:style-name="P108">Welches dieser Modelle passt am besten zu deiner Zielgruppe? Möchtest du es eher als private Plattform für Paare aufziehen oder als Tool für Creator und deren Fans?</text:p>
      </text:section>
      <text:p text:style-name="P106"/>
      <text:p text:style-name="P106"/>
      <text:p text:style-name="P106"/>
      <text:section text:style-name="Sect2" text:name="04231ef12487a1be">
        <text:section text:style-name="Sect2" text:name="user-query-content-2">
          <text:p text:style-name="P116">zB für Chaturbate, also neues model auf das die leute switchen können</text:p>
        </text:section>
        <text:section text:style-name="Sect1" text:name="model-response-message-contentr_04231ef12487a1be">
          <text:p text:style-name="P117">Das ist strategisch ein extrem smarter Ansatz. Portale wie Chaturbate haben gigantischen Traffic, aber die integrierten Web-Cams und Steuerungselemente sind oft technisch veraltet oder bieten nicht die Intimität eines echten, privaten 1-zu-1-Chats mit tiefer Hardware-Integration.</text:p>
          <text:p text:style-name="P118">Wenn du dein System als <text:span text:style-name="T9">"Premium-Addon"</text:span> oder <text:span text:style-name="T9">"External Private Room"</text:span> für bestehende Chaturbate-Models positionierst, löst du ein echtes Problem für die Creator: Sie können ihren High-Paying-Kunden ein exklusives, ultra-privates Next-Level-Erlebnis bieten.</text:p>
          <text:p text:style-name="P118">Hier ist der Fahrplan, wie das technisch und geschäftlich als "Switch-Modell" funktioniert:</text:p>
          <text:h text:style-name="P119" text:outline-level="2"><text:soft-page-break/>1. Der Workflow: Wie wechseln die User?</text:h>
          <text:p text:style-name="P118">Da Chaturbate externe Links im Chat erlaubt (oft gekoppelt an bestimmte Regeln oder Link-Verkürzer), sieht der Ablauf für das Model und den User so aus:</text:p>
          <text:list text:style-name="L52">
            <text:list-item>
              <text:p text:style-name="P120"><text:span text:style-name="T9">Das Model wirbt auf Chaturbate:</text:span> „<text:span text:style-name="T14">Willst du die volle Kontrolle in HD und ohne Server-Lag? Komm in meinen privaten Tangent-Club-Raum. Preis: X Token pro Minute.</text:span>“</text:p>
            </text:list-item>
            <text:list-item>
              <text:p text:style-name="P120"><text:span text:style-name="T9">Die Bezahlung (Token-Transfer):</text:span> Der User tippt die Token direkt auf Chaturbate (z.B. über ein Ticket-Show-Feature oder als Direkt-Tipp).</text:p>
            </text:list-item>
            <text:list-item>
              <text:p text:style-name="P121"><text:span text:style-name="T3">Der Switch:</text:span><text:span text:style-name="T15"> Nach der Bezahlung flüstert das Model (oder ein automatisierter Chat-Bot) dem User den Link zu deinem Raum oder die </text:span><text:span text:style-name="T3">Peer-ID</text:span><text:span text:style-name="T15"> (z. B. </text:span><text:span text:style-name="Source_20_Text"><text:span text:style-name="T15">593f61b6...</text:span></text:span><text:span text:style-name="T15">) zu.</text:span></text:p>
            </text:list-item>
            <text:list-item>
              <text:p text:style-name="P120"><text:span text:style-name="T9">Die Session:</text:span> Der User öffnet deine Seite, gibt die ID ein und die P2P-Verbindung steht – komplett privat, hochauflösend und mit den von dir geplanten interaktiven Profil-Buttons.</text:p>
            </text:list-item>
          </text:list>
          <text:h text:style-name="P119" text:outline-level="2">2. Wie du als Betreiber daran verdienst (Monetarisierung)</text:h>
          <text:p text:style-name="P118">Wenn die Token auf Chaturbate fließen, kommst du an dieses Geld erst mal nicht direkt heran. Um deine Plattform zu monetarisieren, hast du zwei geniale Wege:</text:p>
          <text:h text:style-name="P122" text:outline-level="3">Option A: Das "SaaS-Modell" für Models (Abo)</text:h>
          <text:p text:style-name="P118">Du verkaufst die Nutzung deiner Plattform als professionelles Werkzeug direkt an die Models.</text:p>
          <text:list text:style-name="L53">
            <text:list-item>
              <text:p text:style-name="P123"><text:span text:style-name="T9">Das Prinzip:</text:span> Das Model zahlt eine monatliche Gebühr (z. B. 19 € bis 49 €), um unbegrenzt private Räume auf deiner Domain hosten zu können.</text:p>
            </text:list-item>
            <text:list-item>
              <text:p text:style-name="P123"><text:span text:style-name="T9">Argument fürs Model:</text:span> „<text:span text:style-name="T14">Wenn du nur zwei private Sessions über dieses Tool machst, hast du die Monatsgebühr durch die höhere Kundenzufriedenheit und die Premium-Preise wieder drin.</text:span>“</text:p>
            </text:list-item>
          </text:list>
          <text:h text:style-name="P122" text:outline-level="3">Option B: Die Integration einer eigenen Token-API (Langzeit-Ziel)</text:h>
          <text:p text:style-name="P118">Du baust ein eigenes kleines Wallet-System ein. User können direkt bei dir via Krypto oder Kreditkarte Token kaufen, um die "Quick-Actions" (wie <text:span text:style-name="T14">Spank ass</text:span>) auszulösen. Das Model casht dann bei dir aus, und du behältst 20 % Provision.</text:p>
          <text:h text:style-name="P119" text:outline-level="2">3. Technische &amp; visuelle Anpassungen für dieses Szenario</text:h>
          <text:p text:style-name="P118">Um für Chaturbate-Models attraktiv zu sein, sollte deine UI genau darauf optimiert werden:</text:p>
          <text:list text:style-name="L54">
            <text:list-item>
              <text:p text:style-name="P124"><text:span text:style-name="T3">Schneller Verbindungsaufbau (One-Click-Connect):</text:span><text:span text:style-name="T15"> Statt dass der User die lange Peer-ID kopieren muss, generiert deine App einen Link wie </text:span><text:span text:style-name="Source_20_Text"><text:span text:style-name="T15">tangent-club.com/room/593f61b6...</text:span></text:span><text:span text:style-name="T15">. Klickt der User drauf, verbindet er sich automatisch als Gast.</text:span></text:p>
            </text:list-item>
            <text:list-item>
              <text:p text:style-name="P125"><text:span text:style-name="T9">"Tip-Menu" direkt integrieren:</text:span> Die von dir beschriebene Profil-Ansicht mit den Vorlieben wird zum <text:span text:style-name="T9">interaktiven Tip-Menü</text:span>. Das Model stellt im Profil ein: <text:span text:style-name="T16">„</text:span><text:span text:style-name="T14">Spank ass = 50 Tokens“</text:span>. Der User sieht das im Chat, klickt drauf, und die App schickt das Signal an die Hardware.</text:p>
            </text:list-item>
            <text:list-item>
              <text:p text:style-name="P125"><text:span text:style-name="T9">OBS-Overlay-Tauglichkeit:</text:span> Viele Models nutzen OBS Studio. Wenn deine Chat-Konsole oder die Aktions-Karten (z.B. <text:span text:style-name="T16">„</text:span><text:span text:style-name="T14">UserX triggered Spank ass“</text:span>) als transparente Browserquelle in OBS eingebunden werden könnten, wäre das ein unschlagbares Verkaufsargument.</text:p>
            </text:list-item>
          </text:list>
          <text:h text:style-name="P119" text:outline-level="2"><text:soft-page-break/>Fazit &amp; nächster Schritt</text:h>
          <text:p text:style-name="P118">Die Kombination aus <text:span text:style-name="T9">Chaturbate als Traffic-Quelle</text:span> und <text:span text:style-name="T9">deiner App als Premium-Verschlüsselungs-Oase</text:span> ist perfekt. Du musst dich nicht um das Marketing für Millionen Enduser kümmern, sondern überzeugst einfach die Models, die die Kunden ohnehin schon mitbringen.</text:p>
          <text:p text:style-name="P117"><text:span text:style-name="T15">Willst du das System erst mal so aufbauen, dass es rein über Direkt-Links (</text:span><text:span text:style-name="Source_20_Text"><text:span text:style-name="T15">room/ID</text:span></text:span><text:span text:style-name="T15">) funktioniert, um den Einstieg für externe User so barrierefrei wie möglich zu machen?</text:span></text:p>
        </text:section>
      </text:section>
      <text:section text:style-name="Sect2" text:name="938291b56fc0819a">
        <text:p text:style-name="P126"/>
        <text:section text:style-name="Sect2" text:name="user-query-content-3">
          <text:p text:style-name="P116">Das Design müsst an CB angepasst werden</text:p>
        </text:section>
        <text:section text:style-name="Sect1" text:name="model-response-message-contentr_938291b56fc0819a">
          <text:p text:style-name="P117">Das macht strategisch absolut Sinn! Wenn das Interface visuell an das gewohnte Ökosystem von Chaturbate (CB) angepasst ist, fühlen sich sowohl die Models als auch die User sofort "zuhause". Das senkt die Einstiegshürde enorm, da das Design Vertrauen schafft und intuitiv gelernt ist.</text:p>
          <text:p text:style-name="P118">Chaturbate setzt visuell stark auf eine sehr spezifische, kontrastreiche Farbpalette und ein klares, kompaktes Layout. Hier ist der Fahrplan, wie du dein aktuelles Interface in ein maßgeschneidertes „<text:span text:style-name="T9">CB-Premium-Design“</text:span> verwandelst:</text:p>
          <text:h text:style-name="P119" text:outline-level="2">1. Die CB-Farbpalette (UI-Colors)</text:h>
          <text:p text:style-name="P118">Um den typischen CB-Look zu treffen, solltest du die aktuellen dunklen Blau- und Grautöne durch die charakteristischen CB-Farben ersetzen. Das bedeutet konkret:</text:p>
          <text:list text:style-name="L55">
            <text:list-item>
              <text:p text:style-name="P127"><text:span text:style-name="T3">Haupt-Hintergrund:</text:span><text:span text:style-name="T15"> Ein sehr dunkles, fast reines Anthrazit/Schwarz (</text:span><text:span text:style-name="Source_20_Text"><text:span text:style-name="T15">#121212</text:span></text:span><text:span text:style-name="T15"> oder </text:span><text:span text:style-name="Source_20_Text"><text:span text:style-name="T15">#1a1a1a</text:span></text:span><text:span text:style-name="T15">).</text:span></text:p>
            </text:list-item>
            <text:list-item>
              <text:p text:style-name="P127"><text:span text:style-name="T3">Container &amp; Boxen:</text:span><text:span text:style-name="T15"> Ein klares, mattes Dunkelgrau (</text:span><text:span text:style-name="Source_20_Text"><text:span text:style-name="T15">#222222</text:span></text:span><text:span text:style-name="T15">), damit sich die Sektionen (Connection, Chat) sauber vom Hintergrund abheben.</text:span></text:p>
            </text:list-item>
            <text:list-item>
              <text:p text:style-name="P127"><text:span text:style-name="T3">Die CB-Akzentfarbe (Buttons &amp; Highlights):</text:span><text:span text:style-name="T15"> Hier kommt das typische, leuchtende </text:span><text:span text:style-name="T3">CB-Orange</text:span><text:span text:style-name="T15"> ins Spiel (z. B. </text:span><text:span text:style-name="Source_20_Text"><text:span text:style-name="T15">#ff4500</text:span></text:span><text:span text:style-name="T15"> oder </text:span><text:span text:style-name="Source_20_Text"><text:span text:style-name="T15">#f60</text:span></text:span><text:span text:style-name="T15">). Verwende dieses Orange für:</text:span></text:p>
              <text:list>
                <text:list-item>
                  <text:p text:style-name="P128">Den „Connect“- oder „Start“-Button.</text:p>
                </text:list-item>
                <text:list-item>
                  <text:p text:style-name="P128">Das von dir geplante <text:span text:style-name="T9">Settings-/Profil-Icon</text:span> oben rechts.</text:p>
                </text:list-item>
                <text:list-item>
                  <text:p text:style-name="P128">Den „Senden“-Button im Chat.</text:p>
                </text:list-item>
              </text:list>
            </text:list-item>
            <text:list-item>
              <text:p text:style-name="P127"><text:span text:style-name="T3">Textfarben:</text:span><text:span text:style-name="T15"> Ein klares Weiß (</text:span><text:span text:style-name="Source_20_Text"><text:span text:style-name="T15">#ffffff</text:span></text:span><text:span text:style-name="T15">) für wichtige Titel und ein helles Grau (</text:span><text:span text:style-name="Source_20_Text"><text:span text:style-name="T15">#aaaaaa</text:span></text:span><text:span text:style-name="T15">) für Sekundärtexte (wie die Peer-ID-Beschriftung).</text:span></text:p>
            </text:list-item>
          </text:list>
          <text:h text:style-name="P119" text:outline-level="2">2. Umstrukturierung für den "CB-Look"</text:h>
          <text:p text:style-name="P118">Das aktuelle Layout ist nebeneinander aufgebaut (Side-by-side). CB-Nutzer sind jedoch an eine ganz bestimmte Anordnung gewöhnt, wenn sie einen Raum betreten:</text:p>
          <text:list text:style-name="L56">
            <text:list-item>
              <text:p text:style-name="P129"><text:span text:style-name="T9">Der Fokus (Mitte/Links):</text:span> Das Videofenster des Models sollte groß im Fokus stehen. Das zweite Fenster (der Peer-Stream des Users) kann entweder als kleineres „Picture-in-Picture“ (PiP) in die Ecke des Hauptvideos wandern oder dezent darunter platziert werden.</text:p>
            </text:list-item>
            <text:list-item>
              <text:p text:style-name="P129"><text:span text:style-name="T9">Die Chat-Konsole (Rechts):</text:span> Bei CB ist der Chat <text:span text:style-name="T14">immer</text:span> auf der rechten Seite und zieht sich über die volle Höhe des Videofensters.</text:p>
              <text:list>
                <text:list-item>
                  <text:p text:style-name="P129">Wenn du die <text:span text:style-name="T9">Live-Chat-Box</text:span> nach rechts verschiebst und vertikal streckst, triffst du exakt die gewohnte User Experience.</text:p>
                </text:list-item>
              </text:list>
            </text:list-item>
            <text:list-item>
              <text:p text:style-name="P129"><text:span text:style-name="T9">Das Steuerungs- &amp; Profil-Panel (Unten):</text:span> Die Boxen für „Connection“ und deine geplante „Remote Control / Vorlieben“-Sektion wandern am besten in eine übersichtliche Leiste direkt <text:span text:style-name="T14">unter</text:span> das Videofenster – genau dort, wo bei CB normalerweise das Tip-Menü sitzt.</text:p>
            </text:list-item>
          </text:list>
          <text:h text:style-name="P119" text:outline-level="2"><text:soft-page-break/>3. Integration deines Profil- &amp; Vorlieben-Konzepts im CB-Stil</text:h>
          <text:p text:style-name="P118">Da du die Vorlieben (wie <text:span text:style-name="T14">Spank ass</text:span>) interaktiv machen willst, können wir das perfekt als das typische „<text:span text:style-name="T9">CB Tip Menu“</text:span> tarnen:</text:p>
          <text:list text:style-name="L57">
            <text:list-item>
              <text:p text:style-name="P130"><text:span text:style-name="T9">Der Settings-Button:</text:span> Oben rechts über dem Chat platzierst du das Zahnrad- oder Profil-Icon in CB-Orange. Hier stellt das Model seine Vorlieben ein.</text:p>
            </text:list-item>
            <text:list-item>
              <text:p text:style-name="P130"><text:span text:style-name="T9">Die Vorlieben-Badges im Chat:</text:span> Wenn das Model im Profil Optionen freischaltet, erscheinen diese unter dem Video als anklickbare, orangefarbene Buttons.</text:p>
            </text:list-item>
            <text:list-item>
              <text:p text:style-name="P130"><text:span text:style-name="T9">Optik im Chatverlauf:</text:span> Wenn ein User eine Vorliebe auswählt, wird das im Chat exakt so formatiert, wie es die User von CB-Bots gewohnt sind:</text:p>
              <text:p text:style-name="P131">🌟 <text:span text:style-name="T9">[User_123] triggered: [ Spank ass ]</text:span> ⚡</text:p>
            </text:list-item>
          </text:list>
        </text:section>
      </text:section>
      <text:p text:style-name="P106"/>
      <text:p text:style-name="P106"/>
      <text:p text:style-name="P106"/>
      <text:p text:style-name="P132"/>
      <text:p text:style-name="P133"><text:span text:style-name="T17">T</text:span>okens are necessary to give you satisfaction otherwise the camgirls block you, therefor we need another system</text:p>
      <text:p text:style-name="P133"/>
      <text:section text:style-name="Sect1" text:name="model-response-message-contentr_d3cdff458d385834">
        <text:p text:style-name="P117">Exactly. If you are just a regular user in her public Chaturbate room, you are competing with hundreds of other guys dropping tokens. If you don't tip there, the Lovense bots or the model herself will just mute, kick, or ignore you.</text:p>
        <text:p text:style-name="P117"><text:span text:style-name="T15">If your goal for </text:span><text:span text:style-name="Source_20_Text"><text:span text:style-name="T15">tangent-club</text:span></text:span><text:span text:style-name="T15"> is to bypass that public token-grind and build a "direct-to-model" connection, you need a different technical and financial architecture.</text:span></text:p>
        <text:p text:style-name="P118">Here are the structural options for how a system like yours can work to keep both the model happy (getting paid) and you satisfied (getting direct control without competing for tokens):</text:p>
        <text:h text:style-name="P122" text:outline-level="3">1. The "Whitelabel API" Method (Paid Access via Your Site)</text:h>
        <text:p text:style-name="P118">Instead of trying to inject your commands into her public Chaturbate stream for free, your platform acts as the <text:span text:style-name="T9">billing and control gateway</text:span>.</text:p>
        <text:list text:style-name="L58">
          <text:list-item>
            <text:p text:style-name="P134"><text:span text:style-name="T9">How it works:</text:span> The model signs up on your site. You pay her directly through your platform (via a subscription, a flat per-minute fee, or your own club credits).</text:p>
          </text:list-item>
          <text:list-item>
            <text:p text:style-name="P135"><text:span text:style-name="T3">The Tech:</text:span><text:span text:style-name="T15"> Your site connects directly to her Lovense account via the </text:span><text:span text:style-name="T3">Lovense Developer API</text:span><text:span text:style-name="T15"> using her specific </text:span><text:span text:style-name="Source_20_Text"><text:span text:style-name="T15">Lovense Token</text:span></text:span><text:span text:style-name="T15">. When you interact on your site, your platform sends the execution commands directly to her app.</text:span></text:p>
          </text:list-item>
          <text:list-item>
            <text:p text:style-name="P134"><text:span text:style-name="T9">Why she won't block you:</text:span> She is getting paid directly by your platform's backend, so she explicitly turns off or ignores her Chaturbate toys while she is fulfilling her time with you.</text:p>
          </text:list-item>
        </text:list>
        <text:h text:style-name="P122" text:outline-level="3">2. The "Private Show" Automation (Chaturbate API Integration)</text:h>
        <text:p text:style-name="P118">If she insists on staying entirely within Chaturbate's financial ecosystem but you want a custom interface on your end:</text:p>
        <text:list text:style-name="L59">
          <text:list-item>
            <text:p text:style-name="P136"><text:span text:style-name="T9">How it works:</text:span> Your site uses Chaturbate's <text:span text:style-name="T9">Webmaster/Affiliate API</text:span> or a custom Chaturbate bot.</text:p>
          </text:list-item>
          <text:list-item>
            <text:p text:style-name="P136"><text:span text:style-name="T9">The Tech:</text:span> When you trigger an action on your site, your backend automatically sends the corresponding token tip to her Chaturbate account via the API under your username.</text:p>
          </text:list-item>
          <text:list-item>
            <text:p text:style-name="P136"><text:soft-page-break/><text:span text:style-name="T9">The Result:</text:span> The tokens are still deducted from your balance and credited to her on Chaturbate (keeping her happy), but the <text:span text:style-name="T14">interface</text:span> you use to control the action is your custom web application, not the messy Chaturbate chat room.</text:p>
          </text:list-item>
        </text:list>
        <text:h text:style-name="P122" text:outline-level="3">3. The "Hardware Split" (The Subversive Way)</text:h>
        <text:p text:style-name="P118">If you want to control her while she is actively doing a public stream on Chaturbate without her public audience knowing you are the one doing it:</text:p>
        <text:list text:style-name="L60">
          <text:list-item>
            <text:p text:style-name="P137"><text:span text:style-name="T9">How it works:</text:span> She uses two different toys. Toy A is synced to Chaturbate (public tokens). Toy B is synced <text:span text:style-name="T14">only</text:span> to your platform.</text:p>
          </text:list-item>
          <text:list-item>
            <text:p text:style-name="P137"><text:span text:style-name="T9">Why this works:</text:span> You pay her a flat rate (perhaps via a third-party platform or direct payment) to wear Toy B just for you. The Chaturbate crowd thinks they are controlling her with their tokens, but you have a continuous, uninterrupted connection to Toy B via your site's WebSocket/PeerJS connection.</text:p>
          </text:list-item>
        </text:list>
        <text:h text:style-name="P122" text:outline-level="3">Summary for your development</text:h>
        <text:p text:style-name="P118">To make a system like this viable, <text:span text:style-name="T9">the monetization must be built into the connection.</text:span></text:p>
        <text:p text:style-name="P118">Camgirls only block users who look like "time-wasters." If your platform ensures she gets paid for her time or per vibration—either via a direct payout system you build or by automating token-tipping in the background—she will happily keep your connection open and prioritize your signals.</text:p>
      </text:section>
      <text:p text:style-name="P1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4T10:46:52.469631000</meta:creation-date>
    <meta:generator>LibreOffice/26.2.2.2$MacOSX_AARCH64 LibreOffice_project/1f77d10d6938fd34972958f64b2bcfa54f8b1ba5</meta:generator>
    <dc:date>2026-05-31T00:12:41.320158000</dc:date>
    <meta:editing-duration>PT1H53M6S</meta:editing-duration>
    <meta:editing-cycles>18</meta:editing-cycles>
    <meta:document-statistic meta:table-count="0" meta:image-count="0" meta:object-count="0" meta:page-count="21" meta:paragraph-count="428" meta:word-count="4336" meta:character-count="28659" meta:non-whitespace-character-count="24917"/>
  </office:meta>
</office:document-meta>
</file>